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00000001006433B094.png"/>
  <manifest:file-entry manifest:media-type="image/png" manifest:full-path="Pictures/100002010000025A000003D1F1A5CBB9.png"/>
  <manifest:file-entry manifest:media-type="image/png" manifest:full-path="Pictures/100002010000010000000100780FE7D2.png"/>
  <manifest:file-entry manifest:media-type="image/png" manifest:full-path="Pictures/10000201000001000000010019D81665.png"/>
  <manifest:file-entry manifest:media-type="image/png" manifest:full-path="Pictures/100002010000010000000100B1538634.png"/>
  <manifest:file-entry manifest:media-type="image/png" manifest:full-path="Pictures/100002010000010000000100FFA09F48.png"/>
  <manifest:file-entry manifest:media-type="image/png" manifest:full-path="Pictures/100002010000010000000100361D1B40.png"/>
  <manifest:file-entry manifest:media-type="image/png" manifest:full-path="Pictures/1000020100000100000001008FAED23D.png"/>
  <manifest:file-entry manifest:media-type="image/png" manifest:full-path="Pictures/1000020100000100000001004F84BA08.png"/>
  <manifest:file-entry manifest:media-type="image/png" manifest:full-path="Pictures/100002010000010000000100BE6F64DA.png"/>
  <manifest:file-entry manifest:media-type="image/png" manifest:full-path="Pictures/100002010000010000000100389D842D.png"/>
  <manifest:file-entry manifest:media-type="image/png" manifest:full-path="Pictures/100002010000010000000100C655EA98.png"/>
  <manifest:file-entry manifest:media-type="image/png" manifest:full-path="Pictures/10000201000001000000010050045A3E.png"/>
  <manifest:file-entry manifest:media-type="image/png" manifest:full-path="Pictures/100002010000010000000100CE2CE13A.png"/>
  <manifest:file-entry manifest:media-type="image/png" manifest:full-path="Pictures/100002010000010000000100E7CC376E.png"/>
  <manifest:file-entry manifest:media-type="image/png" manifest:full-path="Pictures/100002010000010000000100A787CCF9.png"/>
  <manifest:file-entry manifest:media-type="image/png" manifest:full-path="Pictures/10000201000001000000010073D87919.png"/>
  <manifest:file-entry manifest:media-type="image/png" manifest:full-path="Pictures/100002010000010000000100B512B05C.png"/>
  <manifest:file-entry manifest:media-type="image/png" manifest:full-path="Pictures/10000201000001000000010064851C85.png"/>
  <manifest:file-entry manifest:media-type="image/png" manifest:full-path="Pictures/100002010000010000000100FB0FD7B9.png"/>
  <manifest:file-entry manifest:media-type="image/png" manifest:full-path="Pictures/100002010000010000000100B41E2A59.png"/>
  <manifest:file-entry manifest:media-type="image/png" manifest:full-path="Pictures/100002010000010000000100C52FC0C3.png"/>
  <manifest:file-entry manifest:media-type="image/png" manifest:full-path="Pictures/100002010000010000000100D2FD87C0.png"/>
  <manifest:file-entry manifest:media-type="image/png" manifest:full-path="Pictures/1000020100000100000001005628BDB5.png"/>
  <manifest:file-entry manifest:media-type="image/png" manifest:full-path="Pictures/10000201000007670000032CC549BE84.png"/>
  <manifest:file-entry manifest:media-type="image/png" manifest:full-path="Pictures/100002010000010000000100AD1DEF98.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111827"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9fafb" presentation:display-footer="false" presentation:display-page-number="false" presentation:display-date-time="false"/>
    </style:style>
    <style:style style:name="gr1" style:family="graphic" style:parent-style-name="standard">
      <style:graphic-properties draw:stroke="none" svg:stroke-width="0cm" draw:fill="solid" draw:fill-color="#1a7a4a" draw:auto-grow-height="false" fo:min-height="0cm" fo:min-width="0cm" fo:padding-top="0.125cm" fo:padding-bottom="0.125cm" fo:padding-left="0.25cm" fo:padding-right="0.25cm" fo:wrap-option="wrap"/>
    </style:style>
    <style:style style:name="gr2" style:family="graphic" style:parent-style-name="Oggetto_20_senza_20_riempimento_20_e_20_linea">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middle" draw:auto-grow-height="false" fo:min-height="0cm" fo:min-width="0cm" fo:padding-top="0cm" fo:padding-bottom="0cm" fo:padding-left="0cm" fo:padding-right="0cm" fo:wrap-option="wrap"/>
    </style:style>
    <style:style style:name="gr4" style:family="graphic" style:parent-style-name="standard">
      <style:graphic-properties draw:stroke="solid" svg:stroke-width="0.035cm" svg:stroke-color="#25a863" draw:fill="solid" draw:fill-color="#25a863" draw:auto-grow-height="false" fo:min-height="0cm" fo:min-width="0cm" fo:padding-top="0.125cm" fo:padding-bottom="0.125cm" fo:padding-left="0.25cm" fo:padding-right="0.25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middle"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26cm" svg:stroke-color="#d1d5db" draw:fill="solid" draw:fill-color="#ffffff"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35cm" svg:stroke-color="#1a7a4a" draw:fill="solid" draw:fill-color="#1a7a4a" draw:auto-grow-height="false" fo:min-height="0cm" fo:min-width="0cm" fo:padding-top="0.125cm" fo:padding-bottom="0.125cm" fo:padding-left="0.25cm" fo:padding-right="0.25cm" fo:wrap-option="wrap"/>
    </style:style>
    <style:style style:name="gr9" style:family="graphic" style:parent-style-name="standard">
      <style:graphic-properties draw:stroke="solid" svg:stroke-width="0.053cm" svg:stroke-color="#1a7a4a" draw:fill="solid" draw:fill-color="#e8f5ee" draw:auto-grow-height="false" fo:min-height="0cm" fo:min-width="0cm" fo:padding-top="0.125cm" fo:padding-bottom="0.125cm" fo:padding-left="0.25cm" fo:padding-right="0.25cm" fo:wrap-option="wrap"/>
    </style:style>
    <style:style style:name="gr10" style:family="graphic" style:parent-style-name="Oggetto_20_senza_20_riempimento_20_e_20_linea">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Oggetto_20_senza_20_riempimento_20_e_20_linea">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solid" svg:stroke-width="0.035cm" svg:stroke-color="#111827" draw:fill="solid" draw:fill-color="#111827"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35cm" svg:stroke-color="#374151" draw:fill="solid" draw:fill-color="#374151"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071cm" svg:stroke-color="#111827" draw:marker-start="msArrowEnd_20_5" draw:marker-start-width="0.213cm" draw:marker-start-center="false"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pr1" style:family="presentation" style:parent-style-name="Predefinito-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 style:family="presentation" style:parent-style-name="Predefinito-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1" style:family="paragraph">
      <style:text-properties fo:font-size="18pt"/>
    </style:style>
    <style:style style:name="P2" style:family="paragraph">
      <style:paragraph-properties fo:text-align="center"/>
      <style:text-properties fo:font-size="18pt"/>
    </style:style>
    <style:style style:name="P3" style:family="paragraph">
      <style:paragraph-properties fo:margin-left="0cm" fo:margin-right="0cm" fo:margin-top="0cm" fo:margin-bottom="0cm" fo:text-align="start" fo:text-indent="0cm" style:punctuation-wrap="hanging" style:writing-mode="lr-tb"/>
      <style:text-properties fo:hyphenate="false"/>
    </style:style>
    <style:style style:name="P4" style:family="paragraph">
      <style:paragraph-properties style:font-independent-line-spacing="true"/>
      <style:text-properties fo:font-size="18pt"/>
    </style:style>
    <style:style style:name="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6" style:family="paragraph">
      <style:paragraph-properties fo:text-align="end" style:font-independent-line-spacing="true"/>
      <style:text-properties fo:font-size="18pt" style:font-size-asian="14pt" style:font-size-complex="14pt"/>
    </style:style>
    <style:style style:name="P7" style:family="paragraph">
      <style:paragraph-properties fo:margin-left="0cm" fo:margin-right="0cm" fo:margin-top="0cm" fo:margin-bottom="0.212cm" fo:text-align="start" fo:text-indent="0cm" style:punctuation-wrap="hanging" style:writing-mode="lr-tb"/>
      <style:text-properties fo:hyphenate="false"/>
    </style:style>
    <style:style style:name="P8" style:family="paragraph">
      <style:paragraph-properties fo:margin-left="0cm" fo:margin-right="0cm" fo:margin-top="0cm" fo:margin-bottom="0.071cm" fo:text-align="start" fo:text-indent="0cm" style:punctuation-wrap="hanging" style:writing-mode="lr-tb"/>
      <style:text-properties fo:hyphenate="false"/>
    </style:style>
    <style:style style:name="P9" style:family="paragraph">
      <style:paragraph-properties fo:margin-left="0cm" fo:margin-right="0cm" fo:margin-top="0cm" fo:margin-bottom="0cm" fo:text-align="end" fo:text-indent="0cm" style:punctuation-wrap="hanging" style:writing-mode="lr-tb"/>
      <style:text-properties fo:hyphenate="false"/>
    </style:style>
    <style:style style:name="P10" style:family="paragraph">
      <style:paragraph-properties fo:margin-left="0cm" fo:margin-right="0cm" fo:margin-top="0cm" fo:margin-bottom="0cm" fo:text-align="center" fo:text-indent="0cm" style:punctuation-wrap="hanging" style:writing-mode="lr-tb"/>
      <style:text-properties fo:hyphenate="false"/>
    </style:style>
    <style:style style:name="P11"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P12" style:family="paragraph">
      <style:paragraph-properties fo:margin-left="0cm" fo:margin-right="0cm" fo:margin-top="0cm" fo:margin-bottom="0cm" fo:text-align="start" fo:text-indent="0cm" style:punctuation-wrap="hanging" style:writing-mode="lr-tb" style:font-independent-line-spacing="true"/>
      <style:text-properties fo:font-size="14pt" style:font-size-asian="14pt" style:font-size-complex="14pt" fo:hyphenate="false"/>
    </style:style>
    <style:style style:name="P13" style:family="paragraph">
      <style:paragraph-properties fo:text-align="center"/>
    </style:style>
    <style:style style:name="P14" style:family="paragraph">
      <style:paragraph-properties fo:margin-left="0cm" fo:margin-right="0cm" fo:margin-top="0cm" fo:margin-bottom="0.141cm" fo:text-align="start" fo:text-indent="0cm" style:punctuation-wrap="hanging" style:writing-mode="lr-tb"/>
      <style:text-properties fo:hyphenate="false"/>
    </style:style>
    <style:style style:name="P15" style:family="paragraph">
      <style:paragraph-properties fo:margin-left="0cm" fo:margin-right="0cm" fo:margin-top="0cm" fo:margin-bottom="0.106cm" fo:text-align="start" fo:text-indent="0cm" style:punctuation-wrap="hanging" style:writing-mode="lr-tb"/>
      <style:text-properties fo:hyphenate="false"/>
    </style:style>
    <style:style style:name="T1" style:family="text">
      <style:text-properties fo:color="#000000" style:text-line-through-style="none" fo:font-family="Calibri" style:font-family-generic="swiss" fo:font-size="54pt" fo:letter-spacing="normal" fo:font-style="normal" style:text-underline-style="none" fo:font-weight="bold" style:font-family-asian="Calibri" style:font-pitch-asian="fixed" style:font-size-asian="54pt" style:font-style-asian="normal" style:font-weight-asian="bold" style:font-family-complex="Calibri" style:font-family-generic-complex="swiss" style:font-size-complex="54pt" style:font-style-complex="normal" style:font-weight-complex="bold"/>
    </style:style>
    <style:style style:name="T2" style:family="text">
      <style:text-properties fo:color="#000000" style:text-line-through-style="none" fo:font-family="Calibri" style:font-family-generic="swiss" fo:font-size="20pt" fo:letter-spacing="normal" fo:font-style="italic" style:text-underline-style="none" fo:font-weight="normal" style:font-family-asian="Calibri" style:font-pitch-asian="fixed" style:font-size-asian="20pt" style:font-style-asian="italic" style:font-weight-asian="normal" style:font-family-complex="Calibri" style:font-family-generic-complex="swiss" style:font-size-complex="20pt" style:font-style-complex="italic" style:font-weight-complex="normal"/>
    </style:style>
    <style:style style:name="T3" style:family="text">
      <style:text-properties fo:color="#000000" style:text-line-through-style="none" fo:font-family="Calibri" style:font-family-generic="swiss" fo:font-size="18pt" fo:letter-spacing="normal" fo:font-style="normal" style:text-underline-style="none" fo:font-weight="bold" style:font-family-asian="Calibri" style:font-pitch-asian="fixed" style:font-size-asian="18pt" style:font-style-asian="normal" style:font-weight-asian="bold" style:font-family-complex="Calibri" style:font-family-generic-complex="swiss" style:font-size-complex="18pt" style:font-style-complex="normal" style:font-weight-complex="bold"/>
    </style:style>
    <style:style style:name="T4" style:family="text">
      <style:text-properties fo:color="#000000" style:text-line-through-style="none" fo:font-family="Calibri" style:font-family-generic="swiss" fo:font-size="14pt" fo:letter-spacing="normal" fo:font-style="normal" style:text-underline-style="none" fo:font-weight="normal" style:font-family-asian="Calibri" style:font-pitch-asian="fixed" style:font-size-asian="14pt" style:font-style-asian="normal" style:font-weight-asian="normal" style:font-family-complex="Calibri" style:font-family-generic-complex="swiss" style:font-size-complex="14pt" style:font-style-complex="normal" style:font-weight-complex="normal"/>
    </style:style>
    <style:style style:name="T5" style:family="text">
      <style:text-properties fo:color="#000000" style:text-line-through-style="none" fo:font-family="Calibri" style:font-family-generic="swiss" fo:font-size="12pt" fo:letter-spacing="normal" fo:font-style="normal" style:text-underline-style="none" fo:font-weight="normal" style:font-family-asian="Calibri" style:font-pitch-asian="fixed" style:font-size-asian="12pt" style:font-style-asian="normal" style:font-weight-asian="normal" style:font-family-complex="Calibri" style:font-family-generic-complex="swiss" style:font-size-complex="12pt" style:font-style-complex="normal" style:font-weight-complex="normal"/>
    </style:style>
    <style:style style:name="T6"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7"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8" style:family="text">
      <style:text-properties fo:color="#000000" style:text-line-through-style="none" fo:font-family="Calibri" style:font-family-generic="swiss" fo:font-size="28pt" fo:letter-spacing="normal" fo:font-style="normal" style:text-underline-style="none" fo:font-weight="bold" style:font-family-asian="Calibri" style:font-pitch-asian="fixed" style:font-size-asian="28pt" style:font-style-asian="normal" style:font-weight-asian="bold" style:font-family-complex="Calibri" style:font-family-generic-complex="swiss" style:font-size-complex="28pt" style:font-style-complex="normal" style:font-weight-complex="bold"/>
    </style:style>
    <style:style style:name="T9" style:family="text">
      <style:text-properties fo:color="#000000" style:text-line-through-style="none" fo:font-family="Calibri" style:font-family-generic="swiss" fo:font-size="13pt" fo:letter-spacing="normal" fo:font-style="italic" style:text-underline-style="none" fo:font-weight="normal" style:font-family-asian="Calibri" style:font-pitch-asian="fixed" style:font-size-asian="13pt" style:font-style-asian="italic" style:font-weight-asian="normal" style:font-family-complex="Calibri" style:font-family-generic-complex="swiss" style:font-size-complex="13pt" style:font-style-complex="italic" style:font-weight-complex="normal"/>
    </style:style>
    <style:style style:name="T10" style:family="text">
      <style:text-properties fo:color="#000000" style:text-line-through-style="none" fo:font-family="Calibri" style:font-family-generic="swiss" fo:font-size="13pt" fo:letter-spacing="normal" fo:font-style="normal" style:text-underline-style="none" fo:font-weight="normal" style:font-family-asian="Calibri" style:font-pitch-asian="fixed" style:font-size-asian="13pt" style:font-style-asian="normal" style:font-weight-asian="normal" style:font-family-complex="Calibri" style:font-family-generic-complex="swiss" style:font-size-complex="13pt" style:font-style-complex="normal" style:font-weight-complex="normal"/>
    </style:style>
    <style:style style:name="T11" style:family="text">
      <style:text-properties fo:color="#000000" style:text-line-through-style="none" fo:font-family="Calibri" style:font-family-generic="swiss" fo:font-size="11pt" fo:letter-spacing="normal" fo:font-style="normal" style:text-underline-style="none" fo:font-weight="bold" style:font-family-asian="Calibri" style:font-pitch-asian="fixed" style:font-size-asian="11pt" style:font-style-asian="normal" style:font-weight-asian="bold" style:font-family-complex="Calibri" style:font-family-generic-complex="swiss" style:font-size-complex="11pt" style:font-style-complex="normal" style:font-weight-complex="bold"/>
    </style:style>
    <style:style style:name="T12" style:family="text">
      <style:text-properties fo:color="#000000" style:text-line-through-style="none" fo:font-family="Calibri" style:font-family-generic="swiss" fo:font-size="11pt" fo:letter-spacing="normal" fo:font-style="normal" style:text-underline-style="none" fo:font-weight="normal" style:font-family-asian="Calibri" style:font-pitch-asian="fixed" style:font-size-asian="11pt" style:font-style-asian="normal" style:font-weight-asian="normal" style:font-family-complex="Calibri" style:font-family-generic-complex="swiss" style:font-size-complex="11pt" style:font-style-complex="normal" style:font-weight-complex="normal"/>
    </style:style>
    <style:style style:name="T13" style:family="text">
      <style:text-properties fo:color="#000000" style:text-line-through-style="none" fo:font-family="Calibri" style:font-family-generic="swiss" fo:font-size="14pt" fo:letter-spacing="normal" fo:font-style="normal" style:text-underline-style="none" fo:font-weight="bold" style:font-family-asian="Calibri" style:font-pitch-asian="fixed" style:font-size-asian="14pt" style:font-style-asian="normal" style:font-weight-asian="bold" style:font-family-complex="Calibri" style:font-family-generic-complex="swiss" style:font-size-complex="14pt" style:font-style-complex="normal" style:font-weight-complex="bold"/>
    </style:style>
    <style:style style:name="T14" style:family="text">
      <style:text-properties fo:color="#000000" style:text-line-through-style="none" fo:font-family="Calibri" style:font-family-generic="swiss" fo:font-size="12pt" fo:letter-spacing="normal" fo:font-style="normal" style:text-underline-style="none" fo:font-weight="bold" style:font-family-asian="Calibri" style:font-pitch-asian="fixed" style:font-size-asian="12pt" style:font-style-asian="normal" style:font-weight-asian="bold" style:font-family-complex="Calibri" style:font-family-generic-complex="swiss" style:font-size-complex="12pt" style:font-style-complex="normal" style:font-weight-complex="bold"/>
    </style:style>
    <style:style style:name="T15" style:family="text">
      <style:text-properties fo:color="#000000" style:text-line-through-style="none" fo:font-family="Calibri" style:font-family-generic="swiss" fo:font-size="10pt" fo:letter-spacing="normal" fo:font-style="normal" style:text-underline-style="none" fo:font-weight="normal" style:font-family-asian="Calibri" style:font-pitch-asian="fixed" style:font-size-asian="10pt" style:font-style-asian="normal" style:font-weight-asian="normal" style:font-family-complex="Calibri" style:font-family-generic-complex="swiss" style:font-size-complex="10pt" style:font-style-complex="normal" style:font-weight-complex="normal"/>
    </style:style>
    <style:style style:name="T16" style:family="text">
      <style:text-properties fo:color="#000000" style:text-line-through-style="none" fo:font-family="Calibri" style:font-family-generic="swiss" fo:font-size="9pt" fo:letter-spacing="normal" fo:font-style="normal" style:text-underline-style="none" fo:font-weight="normal" style:font-family-asian="Calibri" style:font-pitch-asian="fixed" style:font-size-asian="9pt" style:font-style-asian="normal" style:font-weight-asian="normal" style:font-family-complex="Calibri" style:font-family-generic-complex="swiss" style:font-size-complex="9pt" style:font-style-complex="normal" style:font-weight-complex="normal"/>
    </style:style>
    <style:style style:name="T17" style:family="text">
      <style:text-properties fo:color="#000000" style:text-line-through-style="none" fo:font-family="Calibri" style:font-family-generic="swiss" fo:font-size="10pt" fo:letter-spacing="normal" fo:font-style="italic" style:text-underline-style="none" fo:font-weight="normal" style:font-family-asian="Calibri" style:font-pitch-asian="fixed" style:font-size-asian="10pt" style:font-style-asian="italic" style:font-weight-asian="normal" style:font-family-complex="Calibri" style:font-family-generic-complex="swiss" style:font-size-complex="10pt" style:font-style-complex="italic" style:font-weight-complex="normal"/>
    </style:style>
    <style:style style:name="T18" style:family="text">
      <style:text-properties fo:color="#000000" style:text-line-through-style="none" fo:font-family="Calibri" style:font-family-generic="swiss" fo:font-size="13pt" fo:letter-spacing="normal" fo:font-style="normal" style:text-underline-style="none" fo:font-weight="bold" style:font-family-asian="Calibri" style:font-pitch-asian="fixed" style:font-size-asian="13pt" style:font-style-asian="normal" style:font-weight-asian="bold" style:font-family-complex="Calibri" style:font-family-generic-complex="swiss" style:font-size-complex="13pt" style:font-style-complex="normal" style:font-weight-complex="bold"/>
    </style:style>
    <style:style style:name="T19" style:family="text">
      <style:text-properties fo:color="#000000" style:text-line-through-style="none" fo:font-family="Calibri" style:font-family-generic="swiss" fo:font-size="9pt" fo:letter-spacing="normal" fo:font-style="italic" style:text-underline-style="none" fo:font-weight="normal" style:font-family-asian="Calibri" style:font-pitch-asian="fixed" style:font-size-asian="9pt" style:font-style-asian="italic" style:font-weight-asian="normal" style:font-family-complex="Calibri" style:font-family-generic-complex="swiss" style:font-size-complex="9pt" style:font-style-complex="italic" style:font-weight-complex="normal"/>
    </style:style>
    <style:style style:name="T20" style:family="text">
      <style:text-properties fo:color="#000000" style:text-line-through-style="none" fo:font-family="Consolas" style:font-family-generic="swiss" fo:font-size="11pt" fo:letter-spacing="normal" fo:font-style="normal" style:text-underline-style="none" fo:font-weight="bold" style:font-family-asian="Consolas" style:font-pitch-asian="fixed" style:font-size-asian="11pt" style:font-style-asian="normal" style:font-weight-asian="bold" style:font-family-complex="Consolas" style:font-family-generic-complex="swiss" style:font-size-complex="11pt" style:font-style-complex="normal" style:font-weight-complex="bold"/>
    </style:style>
    <style:style style:name="T21" style:family="text">
      <style:text-properties fo:color="#000000" style:text-line-through-style="none" fo:font-family="Calibri" style:font-family-generic="swiss" fo:font-size="14pt" fo:letter-spacing="normal" fo:font-style="normal" style:text-underline-style="solid" style:text-underline-width="auto" style:text-underline-color="font-color" fo:font-weight="bold" style:font-family-asian="Calibri" style:font-pitch-asian="fixed" style:font-size-asian="14pt" style:font-style-asian="normal" style:font-weight-asian="bold" style:font-family-complex="Calibri" style:font-family-generic-complex="swiss" style:font-size-complex="14pt" style:font-style-complex="normal" style:font-weight-complex="bold"/>
    </style:style>
    <style:style style:name="T22" style:family="text">
      <style:text-properties fo:color="#000000" style:text-line-through-style="none" fo:font-family="Consolas" style:font-family-generic="swiss" fo:font-size="9pt" fo:letter-spacing="normal" fo:font-style="italic" style:text-underline-style="none" fo:font-weight="normal" style:font-family-asian="Consolas" style:font-pitch-asian="fixed" style:font-size-asian="9pt" style:font-style-asian="italic" style:font-weight-asian="normal" style:font-family-complex="Consolas" style:font-family-generic-complex="swiss" style:font-size-complex="9pt" style:font-style-complex="italic" style:font-weight-complex="normal"/>
    </style:style>
    <style:style style:name="T23" style:family="text">
      <style:text-properties fo:color="#000000" style:text-line-through-style="none" fo:font-family="Consolas" style:font-family-generic="swiss" fo:font-size="10pt" fo:letter-spacing="normal" fo:font-style="normal" style:text-underline-style="none" fo:font-weight="normal" style:font-family-asian="Consolas" style:font-pitch-asian="fixed" style:font-size-asian="10pt" style:font-style-asian="normal" style:font-weight-asian="normal" style:font-family-complex="Consolas" style:font-family-generic-complex="swiss" style:font-size-complex="10pt" style:font-style-complex="normal" style:font-weight-complex="normal"/>
    </style:style>
    <style:style style:name="T24" style:family="text">
      <style:text-properties fo:color="#000000" style:text-line-through-style="none" fo:font-family="Calibri" style:font-family-generic="swiss" fo:font-size="8pt" fo:letter-spacing="normal" fo:font-style="normal" style:text-underline-style="none" fo:font-weight="normal" style:font-family-asian="Calibri" style:font-pitch-asian="fixed" style:font-size-asian="8pt" style:font-style-asian="normal" style:font-weight-asian="normal" style:font-family-complex="Calibri" style:font-family-generic-complex="swiss" style:font-size-complex="8pt" style:font-style-complex="normal" style:font-weight-complex="normal"/>
    </style:style>
    <style:style style:name="T25" style:family="text">
      <style:text-properties fo:color="#000000" style:text-line-through-style="none" fo:font-family="Calibri" style:font-family-generic="swiss" fo:font-size="10pt" fo:letter-spacing="normal" fo:font-style="normal" style:text-underline-style="none" fo:font-weight="bold" style:font-family-asian="Calibri" style:font-pitch-asian="fixed" style:font-size-asian="10pt" style:font-style-asian="normal" style:font-weight-asian="bold" style:font-family-complex="Calibri" style:font-family-generic-complex="swiss" style:font-size-complex="10pt" style:font-style-complex="normal" style:font-weight-complex="bold"/>
    </style:style>
    <style:style style:name="T26" style:family="text">
      <style:text-properties fo:color="#000000" style:text-line-through-style="none" fo:font-family="Calibri" fo:font-size="10pt" fo:letter-spacing="normal" fo:font-style="normal" style:text-underline-style="none" fo:font-weight="normal" style:font-family-asian="Calibri" style:font-pitch-asian="fixed" style:font-size-asian="10pt" style:font-style-asian="normal" style:font-weight-asian="normal" style:font-family-complex="Calibri" style:font-family-generic-complex="swiss" style:font-size-complex="10pt" style:font-style-complex="normal" style:font-weight-complex="normal"/>
    </style:style>
    <style:style style:name="T27" style:family="text">
      <style:text-properties fo:color="#000000" style:text-line-through-style="none" fo:font-family="Calibri" style:font-family-generic="swiss" fo:font-size="11pt" fo:letter-spacing="normal" fo:font-style="italic" style:text-underline-style="none" fo:font-weight="normal" style:font-family-asian="Calibri" style:font-pitch-asian="fixed" style:font-size-asian="11pt" style:font-style-asian="italic" style:font-weight-asian="normal" style:font-family-complex="Calibri" style:font-family-generic-complex="swiss" style:font-size-complex="11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StarSymbol" fo:color="#11182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 1" draw:style-name="dp1" draw:master-page-name="Predefinito" presentation:presentation-page-layout-name="AL1T0">
        <draw:custom-shape draw:name="Shape 0" draw:style-name="gr1" draw:text-style-name="P1" draw:layer="layout" svg:width="3.555cm" svg:height="3.555cm" svg:x="1.524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Image 0" draw:style-name="gr2" draw:text-style-name="P2" draw:layer="layout" svg:width="1.904cm" svg:height="1.904cm" svg:x="2.362cm" svg:y="4.877cm">
          <draw:image xlink:href="Pictures/100002010000010000000100AD1DEF98.png" xlink:type="simple" xlink:show="embed" xlink:actuate="onLoad">
            <text:p/>
          </draw:image>
        </draw:frame>
        <draw:custom-shape draw:name="Text 1" draw:style-name="gr3" draw:text-style-name="P4" draw:layer="layout" svg:width="19.049cm" svg:height="2.539cm" svg:x="5.588cm" svg:y="3.81cm">
          <text:p text:style-name="P3"><text:span text:style-name="T1">TicketStadio</text:span></text:p>
          <draw:enhanced-geometry svg:viewBox="0 0 21600 21600" draw:type="rectangle" draw:enhanced-path="M 0 0 L 21600 0 21600 21600 0 21600 0 0 Z N"/>
        </draw:custom-shape>
        <draw:custom-shape draw:name="Text 2" draw:style-name="gr3" draw:text-style-name="P4" draw:layer="layout" svg:width="19.049cm" svg:height="1.269cm" svg:x="5.588cm" svg:y="6.477cm">
          <text:p text:style-name="P3"><text:span text:style-name="T2">Sistema di vendita biglietti calcio</text:span></text:p>
          <draw:enhanced-geometry svg:viewBox="0 0 21600 21600" draw:type="rectangle" draw:enhanced-path="M 0 0 L 21600 0 21600 21600 0 21600 0 0 Z N"/>
        </draw:custom-shape>
        <draw:custom-shape draw:name="Shape 3" draw:style-name="gr4" draw:text-style-name="P1" draw:layer="layout" svg:width="3.555cm" svg:height="0.101cm" svg:x="1.524cm" svg:y="8.763cm">
          <text:p/>
          <draw:enhanced-geometry svg:viewBox="0 0 21600 21600" draw:type="rectangle" draw:enhanced-path="M 0 0 L 21600 0 21600 21600 0 21600 0 0 Z N"/>
        </draw:custom-shape>
        <draw:custom-shape draw:name="Text 4" draw:style-name="gr3" draw:text-style-name="P4" draw:layer="layout" svg:width="22.859cm" svg:height="1.015cm" svg:x="1.524cm" svg:y="9.398cm">
          <text:p text:style-name="P3"><text:span text:style-name="T3">Relazione di progetto — Ingegneria del Software</text:span></text:p>
          <draw:enhanced-geometry svg:viewBox="0 0 21600 21600" draw:type="rectangle" draw:enhanced-path="M 0 0 L 21600 0 21600 21600 0 21600 0 0 Z N"/>
        </draw:custom-shape>
        <draw:custom-shape draw:name="Text 5" draw:style-name="gr3" draw:text-style-name="P4" draw:layer="layout" svg:width="22.859cm" svg:height="1.015cm" svg:x="1.524cm" svg:y="10.541cm">
          <text:p text:style-name="P3"><text:span text:style-name="T4">Giacomo Panareo <text:s/>· <text:s/>Università degli Studi di Ferrara</text:span></text:p>
          <draw:enhanced-geometry svg:viewBox="0 0 21600 21600" draw:type="rectangle" draw:enhanced-path="M 0 0 L 21600 0 21600 21600 0 21600 0 0 Z N"/>
        </draw:custom-shape>
        <draw:custom-shape draw:name="Text 6" draw:style-name="gr3" draw:text-style-name="P4" draw:layer="layout" svg:width="22.859cm" svg:height="1.015cm" svg:x="1.524cm" svg:y="11.43cm">
          <text:p text:style-name="P3"><text:span text:style-name="T5">A.A. 2025/2026</text:span></text:p>
          <draw:enhanced-geometry svg:viewBox="0 0 21600 21600" draw:type="rectangle" draw:enhanced-path="M 0 0 L 21600 0 21600 21600 0 21600 0 0 Z N"/>
        </draw:custom-shape>
        <presentation:notes draw:style-name="dp2">
          <draw:page-thumbnail draw:name="Slide Image Placeholder 1" draw:style-name="gr5" draw:layer="layout" svg:width="15.239cm" svg:height="8.572cm" svg:x="1.905cm" svg:y="3.175cm" draw:page-number="1" presentation:class="page"/>
          <draw:frame draw:name="Notes Placeholder 2" presentation:style-name="pr1" draw:text-style-name="P4" draw:layer="layout" svg:width="15.239cm" svg:height="10cm" svg:x="1.905cm" svg:y="12.224cm" presentation:class="notes" presentation:user-transformed="true">
            <draw:text-box>
              <text:p><text:span text:style-name="T6">Apertura: 'Buongiorno, il mio progetto si chiama TicketStadio, è un sistema di vendita biglietti per partite di calcio. È stato sviluppato come elaborato congiunto per tre esami — Ingegneria del Software, Basi di Dati e Ingegneria dei Sistemi Web — in modo da affrontare lo stesso dominio applicativo con tre prospettive tecniche diverse. In questa relazione mi concentrerò sugli aspetti di processo, architettura e qualità, propri di Ingegneria del Software.'</text:span></text:p>
            </draw:text-box>
          </draw:frame>
          <draw:frame draw:name="Slide Number Placeholder 3" presentation:style-name="pr2" draw:text-style-name="P6" draw:layer="layout" svg:width="8.254cm" svg:height="1.273cm" svg:x="10.791cm" svg:y="24.126cm" presentation:class="page-number" presentation:user-transformed="true">
            <draw:text-box>
              <text:p text:style-name="P5"><text:span text:style-name="T7"><text:page-number>&lt;numero&gt;</text:page-number></text:span></text:p>
            </draw:text-box>
          </draw:frame>
        </presentation:notes>
      </draw:page>
      <draw:page draw:name="Slide 2" draw:style-name="dp3" draw:master-page-name="Predefinito">
        <draw:custom-shape draw:name="Text 0" draw:style-name="gr3" draw:text-style-name="P4" draw:layer="layout" svg:width="20.319cm" svg:height="1.396cm" svg:x="1.016cm" svg:y="0.889cm">
          <text:p text:style-name="P3"><text:span text:style-name="T8">Oggetto del progetto</text:span></text:p>
          <draw:enhanced-geometry svg:viewBox="0 0 21600 21600" draw:type="rectangle" draw:enhanced-path="M 0 0 L 21600 0 21600 21600 0 21600 0 0 Z N"/>
        </draw:custom-shape>
        <draw:custom-shape draw:name="Text 1" draw:style-name="gr3" draw:text-style-name="P4" draw:layer="layout" svg:width="22.859cm" svg:height="0.761cm" svg:x="1.016cm" svg:y="2.337cm">
          <text:p text:style-name="P3"><text:span text:style-name="T9">Cosa fa TicketStadio</text:span></text:p>
          <draw:enhanced-geometry svg:viewBox="0 0 21600 21600" draw:type="rectangle" draw:enhanced-path="M 0 0 L 21600 0 21600 21600 0 21600 0 0 Z N"/>
        </draw:custom-shape>
        <draw:custom-shape draw:name="Text 2" draw:style-name="gr6" draw:text-style-name="P4" draw:layer="layout" svg:width="13.969cm" svg:height="5.587cm" svg:x="1.27cm" svg:y="3.81cm">
          <text:p text:style-name="P7"><text:span text:style-name="T10">TicketStadio è una web application per la vendita online di biglietti per partite di calcio di uno specifico stadio. Gli utenti registrati possono consultare il calendario delle partite, scegliere un posto numerato sulla mappa del settore, applicare codici promozionali e finalizzare l'acquisto. È previsto un pannello amministrativo per la gestione di partite, promozioni e statistiche di vendita.</text:span></text:p>
          <draw:enhanced-geometry svg:viewBox="0 0 21600 21600" draw:type="rectangle" draw:enhanced-path="M 0 0 L 21600 0 21600 21600 0 21600 0 0 Z N"/>
        </draw:custom-shape>
        <draw:custom-shape draw:name="Shape 3" draw:style-name="gr7" draw:text-style-name="P1" draw:layer="layout" svg:width="13.969cm" svg:height="3.428cm" svg:x="1.27cm" svg:y="9.7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4" draw:style-name="gr3" draw:text-style-name="P4" draw:layer="layout" svg:width="13.207cm" svg:height="0.761cm" svg:x="1.778cm" svg:y="10.033cm">
          <text:p text:style-name="P3"><text:span text:style-name="T11">Stack tecnologico</text:span></text:p>
          <draw:enhanced-geometry svg:viewBox="0 0 21600 21600" draw:type="rectangle" draw:enhanced-path="M 0 0 L 21600 0 21600 21600 0 21600 0 0 Z N"/>
        </draw:custom-shape>
        <draw:custom-shape draw:name="Text 5" draw:style-name="gr6" draw:text-style-name="P4" draw:layer="layout" svg:width="13.207cm" svg:height="2.285cm" svg:x="1.778cm" svg:y="10.795cm">
          <text:p text:style-name="P8"><text:span text:style-name="T11">Backend: </text:span><text:span text:style-name="T12">Java 17, Spring Boot 3.2, JPA, JWT</text:span></text:p>
          <text:p text:style-name="P8"><text:span text:style-name="T11">Database: </text:span><text:span text:style-name="T12">MySQL 8.0 (InnoDB, utf8mb4)</text:span></text:p>
          <text:p text:style-name="P8"><text:span text:style-name="T11">Frontend: </text:span><text:span text:style-name="T12">HTML5, CSS3, JavaScript vanilla</text:span></text:p>
          <text:p text:style-name="P8"><text:span text:style-name="T11">Test: </text:span><text:span text:style-name="T12">JUnit 5, Mockito, H2 in-memory</text:span></text:p>
          <draw:enhanced-geometry svg:viewBox="0 0 21600 21600" draw:type="rectangle" draw:enhanced-path="M 0 0 L 21600 0 21600 21600 0 21600 0 0 Z N"/>
        </draw:custom-shape>
        <draw:custom-shape draw:name="Shape 6" draw:style-name="gr8" draw:text-style-name="P1" draw:layer="layout" svg:width="8.381cm" svg:height="9.397cm" svg:x="16.002cm" svg:y="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Image 0" draw:style-name="gr2" draw:text-style-name="P2" draw:layer="layout" svg:width="1.142cm" svg:height="1.142cm" svg:x="16.637cm" svg:y="4.318cm">
          <draw:image xlink:href="Pictures/100002010000010000000100FB0FD7B9.png" xlink:type="simple" xlink:show="embed" xlink:actuate="onLoad">
            <text:p/>
          </draw:image>
        </draw:frame>
        <draw:custom-shape draw:name="Text 7" draw:style-name="gr3" draw:text-style-name="P4" draw:layer="layout" svg:width="6.095cm" svg:height="1.142cm" svg:x="18.034cm" svg:y="4.318cm">
          <text:p text:style-name="P3"><text:span text:style-name="T13">Utenti target</text:span></text:p>
          <draw:enhanced-geometry svg:viewBox="0 0 21600 21600" draw:type="rectangle" draw:enhanced-path="M 0 0 L 21600 0 21600 21600 0 21600 0 0 Z N"/>
        </draw:custom-shape>
        <draw:custom-shape draw:name="Text 8" draw:style-name="gr3" draw:text-style-name="P4" draw:layer="layout" svg:width="7.365cm" svg:height="0.761cm" svg:x="16.637cm" svg:y="6.096cm">
          <text:p text:style-name="P3"><text:span text:style-name="T14">TIFOSO</text:span></text:p>
          <draw:enhanced-geometry svg:viewBox="0 0 21600 21600" draw:type="rectangle" draw:enhanced-path="M 0 0 L 21600 0 21600 21600 0 21600 0 0 Z N"/>
        </draw:custom-shape>
        <draw:custom-shape draw:name="Text 9" draw:style-name="gr3" draw:text-style-name="P4" draw:layer="layout" svg:width="7.365cm" svg:height="2.031cm" svg:x="16.637cm" svg:y="6.858cm">
          <text:p text:style-name="P3"><text:span text:style-name="T15">Acquista biglietti singoli, sottoscrive abbonamenti, applica promozioni.</text:span></text:p>
          <draw:enhanced-geometry svg:viewBox="0 0 21600 21600" draw:type="rectangle" draw:enhanced-path="M 0 0 L 21600 0 21600 21600 0 21600 0 0 Z N"/>
        </draw:custom-shape>
        <draw:custom-shape draw:name="Text 10" draw:style-name="gr3" draw:text-style-name="P4" draw:layer="layout" svg:width="7.365cm" svg:height="0.761cm" svg:x="16.637cm" svg:y="9.271cm">
          <text:p text:style-name="P3"><text:span text:style-name="T14">ADMIN</text:span></text:p>
          <draw:enhanced-geometry svg:viewBox="0 0 21600 21600" draw:type="rectangle" draw:enhanced-path="M 0 0 L 21600 0 21600 21600 0 21600 0 0 Z N"/>
        </draw:custom-shape>
        <draw:custom-shape draw:name="Text 11" draw:style-name="gr3" draw:text-style-name="P4" draw:layer="layout" svg:width="7.365cm" svg:height="2.031cm" svg:x="16.637cm" svg:y="10.033cm">
          <text:p text:style-name="P3"><text:span text:style-name="T15">Gestisce calendario partite, crea codici sconto, monitora le vendite.</text:span></text:p>
          <draw:enhanced-geometry svg:viewBox="0 0 21600 21600" draw:type="rectangle" draw:enhanced-path="M 0 0 L 21600 0 21600 21600 0 21600 0 0 Z N"/>
        </draw:custom-shape>
        <draw:custom-shape draw:name="Text 12" draw:style-name="gr6" draw:text-style-name="P4" draw:layer="layout" svg:width="15.239cm" svg:height="0.634cm" svg:x="1.016cm" svg:y="13.399cm">
          <text:p text:style-name="P3"><text:span text:style-name="T16">TicketStadio · Ingegneria del Software</text:span></text:p>
          <draw:enhanced-geometry svg:viewBox="0 0 21600 21600" draw:type="rectangle" draw:enhanced-path="M 0 0 L 21600 0 21600 21600 0 21600 0 0 Z N"/>
        </draw:custom-shape>
        <draw:custom-shape draw:name="Text 13" draw:style-name="gr6" draw:text-style-name="P4" draw:layer="layout" svg:width="1.523cm" svg:height="0.634cm" svg:x="22.86cm" svg:y="13.399cm">
          <text:p text:style-name="P9"><text:span text:style-name="T16">2 / 10</text:span></text:p>
          <draw:enhanced-geometry svg:viewBox="0 0 21600 21600" draw:type="rectangle" draw:enhanced-path="M 0 0 L 21600 0 21600 21600 0 21600 0 0 Z N"/>
        </draw:custom-shape>
        <presentation:notes draw:style-name="dp2">
          <draw:page-thumbnail draw:name="Slide Image Placeholder 1" draw:style-name="gr5" draw:layer="layout" svg:width="15.239cm" svg:height="8.572cm" svg:x="1.905cm" svg:y="3.175cm" draw:page-number="2" presentation:class="page"/>
          <draw:frame draw:name="Notes Placeholder 2" presentation:style-name="pr1" draw:text-style-name="P4" draw:layer="layout" svg:width="15.239cm" svg:height="10cm" svg:x="1.905cm" svg:y="12.224cm" presentation:class="notes" presentation:user-transformed="true">
            <draw:text-box>
              <text:p><text:span text:style-name="T6">Inizio dal dominio applicativo. TicketStadio risolve un problema reale: in molte squadre minori la vendita biglietti passa ancora da rivenditori fisici. Ho scelto questo dominio perché è ricco di vincoli interessanti — soprattutto la doppia vendita di un posto, che richiede gestione corretta della concorrenza. I due ruoli (tifoso e admin) coprono due flussi UX completamente diversi e mi hanno permesso di implementare l'autorizzazione granulare.</text:span></text:p>
            </draw:text-box>
          </draw:frame>
          <draw:frame draw:name="Slide Number Placeholder 3" presentation:style-name="pr2" draw:text-style-name="P6" draw:layer="layout" svg:width="8.254cm" svg:height="1.273cm" svg:x="10.791cm" svg:y="24.126cm" presentation:class="page-number" presentation:user-transformed="true">
            <draw:text-box>
              <text:p text:style-name="P5"><text:span text:style-name="T7"><text:page-number>&lt;numero&gt;</text:page-number></text:span></text:p>
            </draw:text-box>
          </draw:frame>
        </presentation:notes>
      </draw:page>
      <draw:page draw:name="Slide 3" draw:style-name="dp3" draw:master-page-name="Predefinito">
        <draw:custom-shape draw:name="Text 0" draw:style-name="gr3" draw:text-style-name="P4" draw:layer="layout" svg:width="20.319cm" svg:height="1.396cm" svg:x="1.016cm" svg:y="0.889cm">
          <text:p text:style-name="P3"><text:span text:style-name="T8">Distribuzione del team</text:span></text:p>
          <draw:enhanced-geometry svg:viewBox="0 0 21600 21600" draw:type="rectangle" draw:enhanced-path="M 0 0 L 21600 0 21600 21600 0 21600 0 0 Z N"/>
        </draw:custom-shape>
        <draw:custom-shape draw:name="Text 1" draw:style-name="gr3" draw:text-style-name="P4" draw:layer="layout" svg:width="22.859cm" svg:height="0.761cm" svg:x="1.016cm" svg:y="2.337cm">
          <text:p text:style-name="P3"><text:span text:style-name="T9">Progetto individuale — tutti i ruoli ricoperti dallo studente</text:span></text:p>
          <draw:enhanced-geometry svg:viewBox="0 0 21600 21600" draw:type="rectangle" draw:enhanced-path="M 0 0 L 21600 0 21600 21600 0 21600 0 0 Z N"/>
        </draw:custom-shape>
        <draw:custom-shape draw:name="Shape 2" draw:style-name="gr7" draw:text-style-name="P1" draw:layer="layout" svg:width="11.175cm" svg:height="3.936cm" svg:x="1.27cm" svg:y="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Image 0" draw:style-name="gr2" draw:text-style-name="P2" draw:layer="layout" svg:width="1.142cm" svg:height="1.142cm" svg:x="1.778cm" svg:y="4.318cm">
          <draw:image xlink:href="Pictures/1000020100000100000001004F84BA08.png" xlink:type="simple" xlink:show="embed" xlink:actuate="onLoad">
            <text:p/>
          </draw:image>
        </draw:frame>
        <draw:custom-shape draw:name="Text 3" draw:style-name="gr3" draw:text-style-name="P4" draw:layer="layout" svg:width="8.889cm" svg:height="1.142cm" svg:x="3.175cm" svg:y="4.318cm">
          <text:p text:style-name="P3"><text:span text:style-name="T13">Product Owner</text:span></text:p>
          <draw:enhanced-geometry svg:viewBox="0 0 21600 21600" draw:type="rectangle" draw:enhanced-path="M 0 0 L 21600 0 21600 21600 0 21600 0 0 Z N"/>
        </draw:custom-shape>
        <draw:custom-shape draw:name="Text 4" draw:style-name="gr3" draw:text-style-name="P4" draw:layer="layout" svg:width="10.159cm" svg:height="1.777cm" svg:x="1.778cm" svg:y="5.715cm">
          <text:p text:style-name="P3"><text:span text:style-name="T12">Analisi requisiti, scrittura user stories, priorità del backlog.</text:span></text:p>
          <draw:enhanced-geometry svg:viewBox="0 0 21600 21600" draw:type="rectangle" draw:enhanced-path="M 0 0 L 21600 0 21600 21600 0 21600 0 0 Z N"/>
        </draw:custom-shape>
        <draw:custom-shape draw:name="Shape 5" draw:style-name="gr7" draw:text-style-name="P1" draw:layer="layout" svg:width="11.175cm" svg:height="3.936cm" svg:x="13.208cm" svg:y="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Image 1" draw:style-name="gr2" draw:text-style-name="P2" draw:layer="layout" svg:width="1.142cm" svg:height="1.142cm" svg:x="13.716cm" svg:y="4.318cm">
          <draw:image xlink:href="Pictures/10000201000001000000010064851C85.png" xlink:type="simple" xlink:show="embed" xlink:actuate="onLoad">
            <text:p/>
          </draw:image>
        </draw:frame>
        <draw:custom-shape draw:name="Text 6" draw:style-name="gr3" draw:text-style-name="P4" draw:layer="layout" svg:width="8.889cm" svg:height="1.142cm" svg:x="15.113cm" svg:y="4.318cm">
          <text:p text:style-name="P3"><text:span text:style-name="T13">Sviluppatore</text:span></text:p>
          <draw:enhanced-geometry svg:viewBox="0 0 21600 21600" draw:type="rectangle" draw:enhanced-path="M 0 0 L 21600 0 21600 21600 0 21600 0 0 Z N"/>
        </draw:custom-shape>
        <draw:custom-shape draw:name="Text 7" draw:style-name="gr3" draw:text-style-name="P4" draw:layer="layout" svg:width="10.159cm" svg:height="1.777cm" svg:x="13.716cm" svg:y="5.715cm">
          <text:p text:style-name="P3"><text:span text:style-name="T12">Implementazione backend Spring Boot, frontend vanilla JS, schema DB.</text:span></text:p>
          <draw:enhanced-geometry svg:viewBox="0 0 21600 21600" draw:type="rectangle" draw:enhanced-path="M 0 0 L 21600 0 21600 21600 0 21600 0 0 Z N"/>
        </draw:custom-shape>
        <draw:custom-shape draw:name="Shape 8" draw:style-name="gr7" draw:text-style-name="P1" draw:layer="layout" svg:width="11.175cm" svg:height="3.936cm" svg:x="1.27cm" svg:y="8.3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Image 2" draw:style-name="gr2" draw:text-style-name="P2" draw:layer="layout" svg:width="1.142cm" svg:height="1.142cm" svg:x="1.778cm" svg:y="8.89cm">
          <draw:image xlink:href="Pictures/100002010000010000000100C52FC0C3.png" xlink:type="simple" xlink:show="embed" xlink:actuate="onLoad">
            <text:p/>
          </draw:image>
        </draw:frame>
        <draw:custom-shape draw:name="Text 9" draw:style-name="gr3" draw:text-style-name="P4" draw:layer="layout" svg:width="8.889cm" svg:height="1.142cm" svg:x="3.175cm" svg:y="8.89cm">
          <text:p text:style-name="P3"><text:span text:style-name="T13">QA Tester</text:span></text:p>
          <draw:enhanced-geometry svg:viewBox="0 0 21600 21600" draw:type="rectangle" draw:enhanced-path="M 0 0 L 21600 0 21600 21600 0 21600 0 0 Z N"/>
        </draw:custom-shape>
        <draw:custom-shape draw:name="Text 10" draw:style-name="gr3" draw:text-style-name="P4" draw:layer="layout" svg:width="10.159cm" svg:height="1.777cm" svg:x="1.778cm" svg:y="10.287cm">
          <text:p text:style-name="P3"><text:span text:style-name="T12">Scrittura test JUnit, definizione casi limite, verifica copertura.</text:span></text:p>
          <draw:enhanced-geometry svg:viewBox="0 0 21600 21600" draw:type="rectangle" draw:enhanced-path="M 0 0 L 21600 0 21600 21600 0 21600 0 0 Z N"/>
        </draw:custom-shape>
        <draw:custom-shape draw:name="Shape 11" draw:style-name="gr7" draw:text-style-name="P1" draw:layer="layout" svg:width="11.175cm" svg:height="3.936cm" svg:x="13.208cm" svg:y="8.3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Image 3" draw:style-name="gr2" draw:text-style-name="P2" draw:layer="layout" svg:width="1.142cm" svg:height="1.142cm" svg:x="13.716cm" svg:y="8.89cm">
          <draw:image xlink:href="Pictures/100002010000010000000100B512B05C.png" xlink:type="simple" xlink:show="embed" xlink:actuate="onLoad">
            <text:p/>
          </draw:image>
        </draw:frame>
        <draw:custom-shape draw:name="Text 12" draw:style-name="gr3" draw:text-style-name="P4" draw:layer="layout" svg:width="8.889cm" svg:height="1.142cm" svg:x="15.113cm" svg:y="8.89cm">
          <text:p text:style-name="P3"><text:span text:style-name="T13">DevOps</text:span></text:p>
          <draw:enhanced-geometry svg:viewBox="0 0 21600 21600" draw:type="rectangle" draw:enhanced-path="M 0 0 L 21600 0 21600 21600 0 21600 0 0 Z N"/>
        </draw:custom-shape>
        <draw:custom-shape draw:name="Text 13" draw:style-name="gr3" draw:text-style-name="P4" draw:layer="layout" svg:width="10.159cm" svg:height="1.777cm" svg:x="13.716cm" svg:y="10.287cm">
          <text:p text:style-name="P3"><text:span text:style-name="T12">Setup ambiente, Dockerfile, gestione repository Git, dump del DB.</text:span></text:p>
          <draw:enhanced-geometry svg:viewBox="0 0 21600 21600" draw:type="rectangle" draw:enhanced-path="M 0 0 L 21600 0 21600 21600 0 21600 0 0 Z N"/>
        </draw:custom-shape>
        <draw:custom-shape draw:name="Text 14" draw:style-name="gr3" draw:text-style-name="P4" draw:layer="layout" svg:width="22.859cm" svg:height="0.761cm" svg:x="1.27cm" svg:y="12.573cm">
          <text:p text:style-name="P3"><text:span text:style-name="T17">Nota: il lavoro è stato organizzato in giornate dedicate (analisi/PO, implementazione, testing) per simulare i diversi ruoli.</text:span></text:p>
          <draw:enhanced-geometry svg:viewBox="0 0 21600 21600" draw:type="rectangle" draw:enhanced-path="M 0 0 L 21600 0 21600 21600 0 21600 0 0 Z N"/>
        </draw:custom-shape>
        <draw:custom-shape draw:name="Text 15" draw:style-name="gr6" draw:text-style-name="P4" draw:layer="layout" svg:width="15.239cm" svg:height="0.634cm" svg:x="1.016cm" svg:y="13.399cm">
          <text:p text:style-name="P3"><text:span text:style-name="T16">TicketStadio · Ingegneria del Software</text:span></text:p>
          <draw:enhanced-geometry svg:viewBox="0 0 21600 21600" draw:type="rectangle" draw:enhanced-path="M 0 0 L 21600 0 21600 21600 0 21600 0 0 Z N"/>
        </draw:custom-shape>
        <draw:custom-shape draw:name="Text 16" draw:style-name="gr6" draw:text-style-name="P4" draw:layer="layout" svg:width="1.523cm" svg:height="0.634cm" svg:x="22.86cm" svg:y="13.399cm">
          <text:p text:style-name="P9"><text:span text:style-name="T16">3 / 10</text:span></text:p>
          <draw:enhanced-geometry svg:viewBox="0 0 21600 21600" draw:type="rectangle" draw:enhanced-path="M 0 0 L 21600 0 21600 21600 0 21600 0 0 Z N"/>
        </draw:custom-shape>
        <presentation:notes draw:style-name="dp2">
          <draw:page-thumbnail draw:name="Slide Image Placeholder 1" draw:style-name="gr5" draw:layer="layout" svg:width="15.239cm" svg:height="8.572cm" svg:x="1.905cm" svg:y="3.175cm" draw:page-number="3" presentation:class="page"/>
          <draw:frame draw:name="Notes Placeholder 2" presentation:style-name="pr1" draw:text-style-name="P4" draw:layer="layout" svg:width="15.239cm" svg:height="10cm" svg:x="1.905cm" svg:y="12.224cm" presentation:class="notes" presentation:user-transformed="true">
            <draw:text-box>
              <text:p><text:span text:style-name="T6">Sottolineare onestamente che il progetto è individuale ma ho cercato di simulare la separazione dei ruoli per non confondere fasi diverse del lavoro. La giornata da Product Owner è dedicata a Trello e all'analisi senza toccare codice; la giornata da Tester si fa solo dopo aver scritto le funzionalità, con mentalità adversariale. Questo è un esercizio utile per non saltare la fase di analisi o di test, che è la trappola tipica dei progetti individuali.</text:span></text:p>
            </draw:text-box>
          </draw:frame>
          <draw:frame draw:name="Slide Number Placeholder 3" presentation:style-name="pr2" draw:text-style-name="P6" draw:layer="layout" svg:width="8.254cm" svg:height="1.273cm" svg:x="10.791cm" svg:y="24.126cm" presentation:class="page-number" presentation:user-transformed="true">
            <draw:text-box>
              <text:p text:style-name="P5"><text:span text:style-name="T7"><text:page-number>&lt;numero&gt;</text:page-number></text:span></text:p>
            </draw:text-box>
          </draw:frame>
        </presentation:notes>
      </draw:page>
      <draw:page draw:name="Slide 4" draw:style-name="dp3" draw:master-page-name="Predefinito">
        <draw:custom-shape draw:name="Text 0" draw:style-name="gr3" draw:text-style-name="P4" draw:layer="layout" svg:width="20.319cm" svg:height="1.396cm" svg:x="1.016cm" svg:y="0.889cm">
          <text:p text:style-name="P3"><text:span text:style-name="T8">Evidenze delle cerimonie</text:span></text:p>
          <draw:enhanced-geometry svg:viewBox="0 0 21600 21600" draw:type="rectangle" draw:enhanced-path="M 0 0 L 21600 0 21600 21600 0 21600 0 0 Z N"/>
        </draw:custom-shape>
        <draw:custom-shape draw:name="Text 1" draw:style-name="gr3" draw:text-style-name="P4" draw:layer="layout" svg:width="22.859cm" svg:height="0.761cm" svg:x="1.016cm" svg:y="2.337cm">
          <text:p text:style-name="P3"><text:span text:style-name="T9">Processo Scrum adattato a progetto individuale</text:span></text:p>
          <draw:enhanced-geometry svg:viewBox="0 0 21600 21600" draw:type="rectangle" draw:enhanced-path="M 0 0 L 21600 0 21600 21600 0 21600 0 0 Z N"/>
        </draw:custom-shape>
        <draw:custom-shape draw:name="Shape 2" draw:style-name="gr9" draw:text-style-name="P1" draw:layer="layout" svg:width="1.777cm" svg:height="1.777cm" svg:x="3.175cm" svg:y="3.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Image 0" draw:style-name="gr2" draw:text-style-name="P2" draw:layer="layout" svg:width="1.015cm" svg:height="1.015cm" svg:x="3.556cm" svg:y="4.318cm">
          <draw:image xlink:href="Pictures/100002010000010000000100FFA09F48.png" xlink:type="simple" xlink:show="embed" xlink:actuate="onLoad">
            <text:p/>
          </draw:image>
        </draw:frame>
        <draw:custom-shape draw:name="Shape 3" draw:style-name="gr7" draw:text-style-name="P1" draw:layer="layout" svg:width="5.841cm" svg:height="6.349cm" svg:x="1.143cm" svg:y="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4" draw:style-name="gr3" draw:text-style-name="P4" draw:layer="layout" svg:width="5.333cm" svg:height="0.888cm" svg:x="1.397cm" svg:y="6.604cm">
          <text:p text:style-name="P10"><text:span text:style-name="T18">Sprint Planning</text:span></text:p>
          <draw:enhanced-geometry svg:viewBox="0 0 21600 21600" draw:type="rectangle" draw:enhanced-path="M 0 0 L 21600 0 21600 21600 0 21600 0 0 Z N"/>
        </draw:custom-shape>
        <draw:custom-shape draw:name="Text 5" draw:style-name="gr3" draw:text-style-name="P4" draw:layer="layout" svg:width="5.333cm" svg:height="0.634cm" svg:x="1.397cm" svg:y="7.493cm">
          <text:p text:style-name="P10"><text:span text:style-name="T19">Inizio settimana</text:span></text:p>
          <draw:enhanced-geometry svg:viewBox="0 0 21600 21600" draw:type="rectangle" draw:enhanced-path="M 0 0 L 21600 0 21600 21600 0 21600 0 0 Z N"/>
        </draw:custom-shape>
        <draw:custom-shape draw:name="Text 6" draw:style-name="gr3" draw:text-style-name="P4" draw:layer="layout" svg:width="5.079cm" svg:height="3.809cm" svg:x="1.524cm" svg:y="8.382cm">
          <text:p text:style-name="P3"><text:span text:style-name="T15">Definizione obiettivi della settimana e selezione card da "Backlog" a "In progress".</text:span></text:p>
          <draw:enhanced-geometry svg:viewBox="0 0 21600 21600" draw:type="rectangle" draw:enhanced-path="M 0 0 L 21600 0 21600 21600 0 21600 0 0 Z N"/>
        </draw:custom-shape>
        <draw:custom-shape draw:name="Shape 7" draw:style-name="gr9" draw:text-style-name="P1" draw:layer="layout" svg:width="1.777cm" svg:height="1.777cm" svg:x="9.271cm" svg:y="3.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Image 1" draw:style-name="gr2" draw:text-style-name="P2" draw:layer="layout" svg:width="1.015cm" svg:height="1.015cm" svg:x="9.652cm" svg:y="4.318cm">
          <draw:image xlink:href="Pictures/100002010000010000000100B41E2A59.png" xlink:type="simple" xlink:show="embed" xlink:actuate="onLoad">
            <text:p/>
          </draw:image>
        </draw:frame>
        <draw:custom-shape draw:name="Shape 8" draw:style-name="gr7" draw:text-style-name="P1" draw:layer="layout" svg:width="5.841cm" svg:height="6.349cm" svg:x="7.239cm" svg:y="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9" draw:style-name="gr3" draw:text-style-name="P4" draw:layer="layout" svg:width="5.333cm" svg:height="0.888cm" svg:x="7.493cm" svg:y="6.604cm">
          <text:p text:style-name="P10"><text:span text:style-name="T18">Daily (self)</text:span></text:p>
          <draw:enhanced-geometry svg:viewBox="0 0 21600 21600" draw:type="rectangle" draw:enhanced-path="M 0 0 L 21600 0 21600 21600 0 21600 0 0 Z N"/>
        </draw:custom-shape>
        <draw:custom-shape draw:name="Text 10" draw:style-name="gr3" draw:text-style-name="P4" draw:layer="layout" svg:width="5.333cm" svg:height="0.634cm" svg:x="7.493cm" svg:y="7.493cm">
          <text:p text:style-name="P10"><text:span text:style-name="T19">Ogni giorno</text:span></text:p>
          <draw:enhanced-geometry svg:viewBox="0 0 21600 21600" draw:type="rectangle" draw:enhanced-path="M 0 0 L 21600 0 21600 21600 0 21600 0 0 Z N"/>
        </draw:custom-shape>
        <draw:custom-shape draw:name="Text 11" draw:style-name="gr3" draw:text-style-name="P4" draw:layer="layout" svg:width="5.079cm" svg:height="3.809cm" svg:x="7.62cm" svg:y="8.382cm">
          <text:p text:style-name="P3"><text:span text:style-name="T15">Auto-review di 5 minuti: cosa ho fatto ieri, cosa farò oggi, blocchi attivi.</text:span></text:p>
          <draw:enhanced-geometry svg:viewBox="0 0 21600 21600" draw:type="rectangle" draw:enhanced-path="M 0 0 L 21600 0 21600 21600 0 21600 0 0 Z N"/>
        </draw:custom-shape>
        <draw:custom-shape draw:name="Shape 12" draw:style-name="gr9" draw:text-style-name="P1" draw:layer="layout" svg:width="1.777cm" svg:height="1.777cm" svg:x="15.367cm" svg:y="3.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Image 2" draw:style-name="gr2" draw:text-style-name="P2" draw:layer="layout" svg:width="1.015cm" svg:height="1.015cm" svg:x="15.748cm" svg:y="4.318cm">
          <draw:image xlink:href="Pictures/100002010000010000000100780FE7D2.png" xlink:type="simple" xlink:show="embed" xlink:actuate="onLoad">
            <text:p/>
          </draw:image>
        </draw:frame>
        <draw:custom-shape draw:name="Shape 13" draw:style-name="gr7" draw:text-style-name="P1" draw:layer="layout" svg:width="5.841cm" svg:height="6.349cm" svg:x="13.335cm" svg:y="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14" draw:style-name="gr3" draw:text-style-name="P4" draw:layer="layout" svg:width="5.333cm" svg:height="0.888cm" svg:x="13.589cm" svg:y="6.604cm">
          <text:p text:style-name="P10"><text:span text:style-name="T18">Sprint Review</text:span></text:p>
          <draw:enhanced-geometry svg:viewBox="0 0 21600 21600" draw:type="rectangle" draw:enhanced-path="M 0 0 L 21600 0 21600 21600 0 21600 0 0 Z N"/>
        </draw:custom-shape>
        <draw:custom-shape draw:name="Text 15" draw:style-name="gr3" draw:text-style-name="P4" draw:layer="layout" svg:width="5.333cm" svg:height="0.634cm" svg:x="13.589cm" svg:y="7.493cm">
          <text:p text:style-name="P10"><text:span text:style-name="T19">Fine settimana</text:span></text:p>
          <draw:enhanced-geometry svg:viewBox="0 0 21600 21600" draw:type="rectangle" draw:enhanced-path="M 0 0 L 21600 0 21600 21600 0 21600 0 0 Z N"/>
        </draw:custom-shape>
        <draw:custom-shape draw:name="Text 16" draw:style-name="gr3" draw:text-style-name="P4" draw:layer="layout" svg:width="5.079cm" svg:height="3.809cm" svg:x="13.716cm" svg:y="8.382cm">
          <text:p text:style-name="P3"><text:span text:style-name="T15">Verifica funzionalità completate, demo personale, validazione contro user stories.</text:span></text:p>
          <draw:enhanced-geometry svg:viewBox="0 0 21600 21600" draw:type="rectangle" draw:enhanced-path="M 0 0 L 21600 0 21600 21600 0 21600 0 0 Z N"/>
        </draw:custom-shape>
        <draw:custom-shape draw:name="Shape 17" draw:style-name="gr9" draw:text-style-name="P1" draw:layer="layout" svg:width="1.777cm" svg:height="1.777cm" svg:x="21.463cm" svg:y="3.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Image 3" draw:style-name="gr2" draw:text-style-name="P2" draw:layer="layout" svg:width="1.015cm" svg:height="1.015cm" svg:x="21.844cm" svg:y="4.318cm">
          <draw:image xlink:href="Pictures/100002010000010000000100C655EA98.png" xlink:type="simple" xlink:show="embed" xlink:actuate="onLoad">
            <text:p/>
          </draw:image>
        </draw:frame>
        <draw:custom-shape draw:name="Shape 18" draw:style-name="gr7" draw:text-style-name="P1" draw:layer="layout" svg:width="5.841cm" svg:height="6.349cm" svg:x="19.431cm" svg:y="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19" draw:style-name="gr3" draw:text-style-name="P4" draw:layer="layout" svg:width="5.333cm" svg:height="0.888cm" svg:x="19.685cm" svg:y="6.604cm">
          <text:p text:style-name="P10"><text:span text:style-name="T18">Retrospective</text:span></text:p>
          <draw:enhanced-geometry svg:viewBox="0 0 21600 21600" draw:type="rectangle" draw:enhanced-path="M 0 0 L 21600 0 21600 21600 0 21600 0 0 Z N"/>
        </draw:custom-shape>
        <draw:custom-shape draw:name="Text 20" draw:style-name="gr3" draw:text-style-name="P4" draw:layer="layout" svg:width="5.333cm" svg:height="0.634cm" svg:x="19.685cm" svg:y="7.493cm">
          <text:p text:style-name="P10"><text:span text:style-name="T19">Fine sprint</text:span></text:p>
          <draw:enhanced-geometry svg:viewBox="0 0 21600 21600" draw:type="rectangle" draw:enhanced-path="M 0 0 L 21600 0 21600 21600 0 21600 0 0 Z N"/>
        </draw:custom-shape>
        <draw:custom-shape draw:name="Text 21" draw:style-name="gr3" draw:text-style-name="P4" draw:layer="layout" svg:width="5.079cm" svg:height="3.809cm" svg:x="19.812cm" svg:y="8.382cm">
          <text:p text:style-name="P3"><text:span text:style-name="T15">Note in file SPRINT_LOG.md: cosa ha funzionato, cosa migliorare, lezioni apprese.</text:span></text:p>
          <draw:enhanced-geometry svg:viewBox="0 0 21600 21600" draw:type="rectangle" draw:enhanced-path="M 0 0 L 21600 0 21600 21600 0 21600 0 0 Z N"/>
        </draw:custom-shape>
        <draw:custom-shape draw:name="Text 22" draw:style-name="gr3" draw:text-style-name="P4" draw:layer="layout" svg:width="22.859cm" svg:height="0.888cm" svg:x="1.27cm" svg:y="12.827cm">
          <text:p text:style-name="P3"><text:span text:style-name="T11">Evidenza pratica: </text:span><text:span text:style-name="T12">il file </text:span><text:span text:style-name="T20">SPRINT_LOG.md</text:span><text:span text:style-name="T12"> nel repository registra le retrospettive di ogni sprint, con tag #fatto, #problema, #lezione.</text:span></text:p>
          <draw:enhanced-geometry svg:viewBox="0 0 21600 21600" draw:type="rectangle" draw:enhanced-path="M 0 0 L 21600 0 21600 21600 0 21600 0 0 Z N"/>
        </draw:custom-shape>
        <draw:custom-shape draw:name="Text 23" draw:style-name="gr6" draw:text-style-name="P4" draw:layer="layout" svg:width="15.239cm" svg:height="0.634cm" svg:x="1.016cm" svg:y="13.399cm">
          <text:p text:style-name="P3"><text:span text:style-name="T16">TicketStadio · Ingegneria del Software</text:span></text:p>
          <draw:enhanced-geometry svg:viewBox="0 0 21600 21600" draw:type="rectangle" draw:enhanced-path="M 0 0 L 21600 0 21600 21600 0 21600 0 0 Z N"/>
        </draw:custom-shape>
        <draw:custom-shape draw:name="Text 24" draw:style-name="gr6" draw:text-style-name="P4" draw:layer="layout" svg:width="1.523cm" svg:height="0.634cm" svg:x="22.86cm" svg:y="13.399cm">
          <text:p text:style-name="P9"><text:span text:style-name="T16">4 / 10</text:span></text:p>
          <draw:enhanced-geometry svg:viewBox="0 0 21600 21600" draw:type="rectangle" draw:enhanced-path="M 0 0 L 21600 0 21600 21600 0 21600 0 0 Z N"/>
        </draw:custom-shape>
        <presentation:notes draw:style-name="dp2">
          <draw:page-thumbnail draw:name="Slide Image Placeholder 1" draw:style-name="gr5" draw:layer="layout" svg:width="15.239cm" svg:height="8.572cm" svg:x="1.905cm" svg:y="3.175cm" draw:page-number="4" presentation:class="page"/>
          <draw:frame draw:name="Notes Placeholder 2" presentation:style-name="pr1" draw:text-style-name="P4" draw:layer="layout" svg:width="15.239cm" svg:height="10cm" svg:x="1.905cm" svg:y="12.224cm" presentation:class="notes" presentation:user-transformed="true">
            <draw:text-box>
              <text:p><text:span text:style-name="T6">Le quattro cerimonie Scrum sono adattate. Il Daily diventa un'auto-review di 5 minuti che mi serve per non perdere il filo. Lo Sprint Planning è guidato dalle card Trello: ne sposto 3-4 da Backlog a In Progress all'inizio della settimana. La Retrospective è documentata in SPRINT_LOG.md con tag come #fatto #problema #lezione, così se il prof mi chiede di mostrare un'evidenza concreta posso aprirla.</text:span></text:p>
            </draw:text-box>
          </draw:frame>
          <draw:frame draw:name="Slide Number Placeholder 3" presentation:style-name="pr2" draw:text-style-name="P6" draw:layer="layout" svg:width="8.254cm" svg:height="1.273cm" svg:x="10.791cm" svg:y="24.126cm" presentation:class="page-number" presentation:user-transformed="true">
            <draw:text-box>
              <text:p text:style-name="P5"><text:span text:style-name="T7"><text:page-number>&lt;numero&gt;</text:page-number></text:span></text:p>
            </draw:text-box>
          </draw:frame>
        </presentation:notes>
      </draw:page>
      <draw:page draw:name="Slide 5" draw:style-name="dp3" draw:master-page-name="Predefinito">
        <draw:custom-shape draw:name="Text 0" draw:style-name="gr3" draw:text-style-name="P4" draw:layer="layout" svg:width="20.319cm" svg:height="1.396cm" svg:x="1.016cm" svg:y="0.889cm">
          <text:p text:style-name="P3"><text:span text:style-name="T8">Disegno funzionale</text:span></text:p>
          <draw:enhanced-geometry svg:viewBox="0 0 21600 21600" draw:type="rectangle" draw:enhanced-path="M 0 0 L 21600 0 21600 21600 0 21600 0 0 Z N"/>
        </draw:custom-shape>
        <draw:custom-shape draw:name="Text 1" draw:style-name="gr3" draw:text-style-name="P4" draw:layer="layout" svg:width="22.859cm" svg:height="0.761cm" svg:x="1.016cm" svg:y="2.337cm">
          <text:p text:style-name="P3"><text:span text:style-name="T9">Flusso utente: dall'arrivo all'acquisto biglietto (estratto da Miro)</text:span></text:p>
          <draw:enhanced-geometry svg:viewBox="0 0 21600 21600" draw:type="rectangle" draw:enhanced-path="M 0 0 L 21600 0 21600 21600 0 21600 0 0 Z N"/>
        </draw:custom-shape>
        <draw:custom-shape draw:name="Text 3" draw:style-name="gr3" draw:text-style-name="P4" draw:layer="layout" svg:width="1.269cm" svg:height="1.269cm" svg:x="2.667cm" svg:y="4.318cm">
          <text:p/>
          <draw:enhanced-geometry svg:viewBox="0 0 21600 21600" draw:type="rectangle" draw:enhanced-path="M 0 0 L 21600 0 21600 21600 0 21600 0 0 Z N"/>
        </draw:custom-shape>
        <draw:custom-shape draw:name="Text 6" draw:style-name="gr3" draw:text-style-name="P4" draw:layer="layout" svg:width="3.809cm" svg:height="1.777cm" svg:x="1.397cm" svg:y="7.874cm">
          <text:p/>
          <draw:enhanced-geometry svg:viewBox="0 0 21600 21600" draw:type="rectangle" draw:enhanced-path="M 0 0 L 21600 0 21600 21600 0 21600 0 0 Z N"/>
        </draw:custom-shape>
        <draw:custom-shape draw:name="Text 7" draw:style-name="gr3" draw:text-style-name="P4" draw:layer="layout" svg:width="3.809cm" svg:height="2.031cm" svg:x="1.397cm" svg:y="9.652cm">
          <text:p/>
          <draw:enhanced-geometry svg:viewBox="0 0 21600 21600" draw:type="rectangle" draw:enhanced-path="M 0 0 L 21600 0 21600 21600 0 21600 0 0 Z N"/>
        </draw:custom-shape>
        <draw:custom-shape draw:name="Text 13" draw:style-name="gr3" draw:text-style-name="P4" draw:layer="layout" svg:width="3.809cm" svg:height="2.031cm" svg:x="6.325cm" svg:y="9.652cm">
          <text:p/>
          <draw:enhanced-geometry svg:viewBox="0 0 21600 21600" draw:type="rectangle" draw:enhanced-path="M 0 0 L 21600 0 21600 21600 0 21600 0 0 Z N"/>
        </draw:custom-shape>
        <draw:custom-shape draw:name="Text 19" draw:style-name="gr3" draw:text-style-name="P4" draw:layer="layout" svg:width="3.809cm" svg:height="2.031cm" svg:x="11.252cm" svg:y="9.652cm">
          <text:p/>
          <draw:enhanced-geometry svg:viewBox="0 0 21600 21600" draw:type="rectangle" draw:enhanced-path="M 0 0 L 21600 0 21600 21600 0 21600 0 0 Z N"/>
        </draw:custom-shape>
        <draw:custom-shape draw:name="Text 25" draw:style-name="gr3" draw:text-style-name="P4" draw:layer="layout" svg:width="3.809cm" svg:height="2.031cm" svg:x="16.18cm" svg:y="9.652cm">
          <text:p/>
          <draw:enhanced-geometry svg:viewBox="0 0 21600 21600" draw:type="rectangle" draw:enhanced-path="M 0 0 L 21600 0 21600 21600 0 21600 0 0 Z N"/>
        </draw:custom-shape>
        <draw:custom-shape draw:name="Text 31" draw:style-name="gr3" draw:text-style-name="P12" draw:layer="layout" svg:width="11.659cm" svg:height="1.961cm" svg:x="0.941cm" svg:y="5.639cm">
          <text:p text:style-name="P11"><text:span text:style-name="T21">Eccezioni gestite: </text:span></text:p>
          <text:p text:style-name="P11"><text:span text:style-name="T4"/></text:p>
          <text:p text:style-name="P11"><text:span text:style-name="T4">posto occupato → 409 Conflict · </text:span></text:p>
          <text:p text:style-name="P11"><text:span text:style-name="T4"/></text:p>
          <text:p text:style-name="P11"><text:span text:style-name="T4">partita annullata → blocco · </text:span></text:p>
          <text:p text:style-name="P11"><text:span text:style-name="T4"/></text:p>
          <text:p text:style-name="P11"><text:span text:style-name="T4">promo scaduta → errore.</text:span></text:p>
          <draw:enhanced-geometry svg:viewBox="0 0 21600 21600" draw:type="rectangle" draw:enhanced-path="M 0 0 L 21600 0 21600 21600 0 21600 0 0 Z N"/>
        </draw:custom-shape>
        <draw:custom-shape draw:name="Text 32" draw:style-name="gr6" draw:text-style-name="P4" draw:layer="layout" svg:width="15.239cm" svg:height="0.634cm" svg:x="1.016cm" svg:y="13.399cm">
          <text:p text:style-name="P3"><text:span text:style-name="T16">TicketStadio · Ingegneria del Software</text:span></text:p>
          <draw:enhanced-geometry svg:viewBox="0 0 21600 21600" draw:type="rectangle" draw:enhanced-path="M 0 0 L 21600 0 21600 21600 0 21600 0 0 Z N"/>
        </draw:custom-shape>
        <draw:custom-shape draw:name="Text 33" draw:style-name="gr6" draw:text-style-name="P4" draw:layer="layout" svg:width="1.523cm" svg:height="0.634cm" svg:x="22.86cm" svg:y="13.399cm">
          <text:p text:style-name="P9"><text:span text:style-name="T16">5 / 10</text:span></text:p>
          <draw:enhanced-geometry svg:viewBox="0 0 21600 21600" draw:type="rectangle" draw:enhanced-path="M 0 0 L 21600 0 21600 21600 0 21600 0 0 Z N"/>
        </draw:custom-shape>
        <draw:frame draw:style-name="gr10" draw:text-style-name="P13" draw:layer="layout" svg:width="10.8cm" svg:height="13cm" svg:x="13.4cm" svg:y="0.399cm">
          <draw:image xlink:href="Pictures/100002010000025A000003D1F1A5CBB9.png" xlink:type="simple" xlink:show="embed" xlink:actuate="onLoad">
            <text:p/>
          </draw:image>
        </draw:frame>
        <presentation:notes draw:style-name="dp2">
          <draw:page-thumbnail draw:name="Slide Image Placeholder 1" draw:style-name="gr5" draw:layer="layout" svg:width="15.239cm" svg:height="8.572cm" svg:x="1.905cm" svg:y="3.175cm" draw:page-number="5" presentation:class="page"/>
          <draw:frame draw:name="Notes Placeholder 2" presentation:style-name="pr1" draw:text-style-name="P4" draw:layer="layout" svg:width="15.239cm" svg:height="10cm" svg:x="1.905cm" svg:y="12.224cm" presentation:class="notes" presentation:user-transformed="true">
            <draw:text-box>
              <text:p><text:span text:style-name="T6">Il flusso principale ha 5 step. Il punto più delicato è lo step 3-4: tra la selezione del posto e il pagamento passa del tempo, durante il quale un altro utente potrebbe acquistare lo stesso posto. Per questo l'unicità (partita_id, posto_id) è enforced a livello DB con un vincolo UNIQUE, e il backend gestisce l'eccezione DataIntegrityViolationException convertendola in HTTP 409 con messaggio chiaro all'utente.</text:span></text:p>
            </draw:text-box>
          </draw:frame>
          <draw:frame draw:name="Slide Number Placeholder 3" presentation:style-name="pr2" draw:text-style-name="P6" draw:layer="layout" svg:width="8.254cm" svg:height="1.273cm" svg:x="10.791cm" svg:y="24.126cm" presentation:class="page-number" presentation:user-transformed="true">
            <draw:text-box>
              <text:p text:style-name="P5"><text:span text:style-name="T7"><text:page-number>&lt;numero&gt;</text:page-number></text:span></text:p>
            </draw:text-box>
          </draw:frame>
        </presentation:notes>
      </draw:page>
      <draw:page draw:name="Slide 6" draw:style-name="dp3" draw:master-page-name="Predefinito">
        <draw:custom-shape draw:name="Text 0" draw:style-name="gr3" draw:text-style-name="P4" draw:layer="layout" svg:width="20.319cm" svg:height="1.396cm" svg:x="1.016cm" svg:y="0.889cm">
          <text:p text:style-name="P3"><text:span text:style-name="T8">Board Trello</text:span></text:p>
          <draw:enhanced-geometry svg:viewBox="0 0 21600 21600" draw:type="rectangle" draw:enhanced-path="M 0 0 L 21600 0 21600 21600 0 21600 0 0 Z N"/>
        </draw:custom-shape>
        <draw:custom-shape draw:name="Text 1" draw:style-name="gr3" draw:text-style-name="P4" draw:layer="layout" svg:width="22.859cm" svg:height="0.761cm" svg:x="1.016cm" svg:y="2.337cm">
          <text:p text:style-name="P3"><text:span text:style-name="T9">Organizzazione del backlog in 4 colonne</text:span></text:p>
          <draw:enhanced-geometry svg:viewBox="0 0 21600 21600" draw:type="rectangle" draw:enhanced-path="M 0 0 L 21600 0 21600 21600 0 21600 0 0 Z N"/>
        </draw:custom-shape>
        <draw:custom-shape draw:name="Text 48" draw:style-name="gr6" draw:text-style-name="P4" draw:layer="layout" svg:width="15.239cm" svg:height="0.634cm" svg:x="1.016cm" svg:y="13.399cm">
          <text:p text:style-name="P3"><text:span text:style-name="T16">TicketStadio · Ingegneria del Software</text:span></text:p>
          <draw:enhanced-geometry svg:viewBox="0 0 21600 21600" draw:type="rectangle" draw:enhanced-path="M 0 0 L 21600 0 21600 21600 0 21600 0 0 Z N"/>
        </draw:custom-shape>
        <draw:custom-shape draw:name="Text 49" draw:style-name="gr6" draw:text-style-name="P4" draw:layer="layout" svg:width="1.523cm" svg:height="0.634cm" svg:x="22.86cm" svg:y="13.399cm">
          <text:p text:style-name="P9"><text:span text:style-name="T16">6 / 10</text:span></text:p>
          <draw:enhanced-geometry svg:viewBox="0 0 21600 21600" draw:type="rectangle" draw:enhanced-path="M 0 0 L 21600 0 21600 21600 0 21600 0 0 Z N"/>
        </draw:custom-shape>
        <draw:frame draw:style-name="gr11" draw:text-style-name="P13" draw:layer="layout" svg:width="23.2cm" svg:height="10.619cm" svg:x="1cm" svg:y="2.6cm">
          <draw:image xlink:href="Pictures/10000201000007670000032CC549BE84.png" xlink:type="simple" xlink:show="embed" xlink:actuate="onLoad">
            <text:p/>
          </draw:image>
        </draw:frame>
        <presentation:notes draw:style-name="dp2">
          <draw:page-thumbnail draw:name="Slide Image Placeholder 1" draw:style-name="gr5" draw:layer="layout" svg:width="15.239cm" svg:height="8.572cm" svg:x="1.905cm" svg:y="3.175cm" draw:page-number="6" presentation:class="page"/>
          <draw:frame draw:name="Notes Placeholder 2" presentation:style-name="pr1" draw:text-style-name="P4" draw:layer="layout" svg:width="15.239cm" svg:height="10cm" svg:x="1.905cm" svg:y="12.224cm" presentation:class="notes" presentation:user-transformed="true">
            <draw:text-box>
              <text:p><text:span text:style-name="T6">La board Trello segue lo schema Kanban classico a 4 colonne. La colonna 'In Progress' è limitata a max 2 card per evitare il context switching, principio del WIP-limit. Tutte le 25 card 'Done' hanno un link al commit Git corrispondente nella descrizione. Mostrare al prof il link del board se lo chiede.</text:span></text:p>
            </draw:text-box>
          </draw:frame>
          <draw:frame draw:name="Slide Number Placeholder 3" presentation:style-name="pr2" draw:text-style-name="P6" draw:layer="layout" svg:width="8.254cm" svg:height="1.273cm" svg:x="10.791cm" svg:y="24.126cm" presentation:class="page-number" presentation:user-transformed="true">
            <draw:text-box>
              <text:p text:style-name="P5"><text:span text:style-name="T7"><text:page-number>&lt;numero&gt;</text:page-number></text:span></text:p>
            </draw:text-box>
          </draw:frame>
        </presentation:notes>
      </draw:page>
      <draw:page draw:name="Slide 7" draw:style-name="dp3" draw:master-page-name="Predefinito">
        <draw:custom-shape draw:name="Text 0" draw:style-name="gr3" draw:text-style-name="P4" draw:layer="layout" svg:width="20.319cm" svg:height="1.396cm" svg:x="1.016cm" svg:y="0.889cm">
          <text:p text:style-name="P3"><text:span text:style-name="T8">Test cases</text:span></text:p>
          <draw:enhanced-geometry svg:viewBox="0 0 21600 21600" draw:type="rectangle" draw:enhanced-path="M 0 0 L 21600 0 21600 21600 0 21600 0 0 Z N"/>
        </draw:custom-shape>
        <draw:custom-shape draw:name="Text 1" draw:style-name="gr3" draw:text-style-name="P4" draw:layer="layout" svg:width="22.859cm" svg:height="0.761cm" svg:x="1.016cm" svg:y="2.337cm">
          <text:p text:style-name="P3"><text:span text:style-name="T9">23 test su 3 livelli — eseguiti con mvn test</text:span></text:p>
          <draw:enhanced-geometry svg:viewBox="0 0 21600 21600" draw:type="rectangle" draw:enhanced-path="M 0 0 L 21600 0 21600 21600 0 21600 0 0 Z N"/>
        </draw:custom-shape>
        <draw:custom-shape draw:name="Shape 2" draw:style-name="gr7" draw:text-style-name="P1" draw:layer="layout" svg:width="7.365cm" svg:height="8.889cm" svg:x="1.016cm" svg:y="3.9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 3" draw:style-name="gr8" draw:text-style-name="P1" draw:layer="layout" svg:width="7.365cm" svg:height="1.396cm" svg:x="1.016cm" svg:y="3.937cm">
          <text:p/>
          <draw:enhanced-geometry svg:viewBox="0 0 21600 21600" draw:type="rectangle" draw:enhanced-path="M 0 0 L 21600 0 21600 21600 0 21600 0 0 Z N"/>
        </draw:custom-shape>
        <draw:custom-shape draw:name="Text 4" draw:style-name="gr3" draw:text-style-name="P4" draw:layer="layout" svg:width="4.571cm" svg:height="1.396cm" svg:x="1.397cm" svg:y="3.937cm">
          <text:p text:style-name="P3"><text:span text:style-name="T13">Unit Test</text:span></text:p>
          <draw:enhanced-geometry svg:viewBox="0 0 21600 21600" draw:type="rectangle" draw:enhanced-path="M 0 0 L 21600 0 21600 21600 0 21600 0 0 Z N"/>
        </draw:custom-shape>
        <draw:custom-shape draw:name="Text 5" draw:style-name="gr3" draw:text-style-name="P4" draw:layer="layout" svg:width="2.158cm" svg:height="1.396cm" svg:x="5.969cm" svg:y="3.937cm">
          <text:p text:style-name="P9"><text:span text:style-name="T12">11 test</text:span></text:p>
          <draw:enhanced-geometry svg:viewBox="0 0 21600 21600" draw:type="rectangle" draw:enhanced-path="M 0 0 L 21600 0 21600 21600 0 21600 0 0 Z N"/>
        </draw:custom-shape>
        <draw:custom-shape draw:name="Text 6" draw:style-name="gr3" draw:text-style-name="P4" draw:layer="layout" svg:width="6.603cm" svg:height="0.761cm" svg:x="1.397cm" svg:y="5.588cm">
          <text:p text:style-name="P3"><text:span text:style-name="T22">JUnit 5 + Mockito</text:span></text:p>
          <draw:enhanced-geometry svg:viewBox="0 0 21600 21600" draw:type="rectangle" draw:enhanced-path="M 0 0 L 21600 0 21600 21600 0 21600 0 0 Z N"/>
        </draw:custom-shape>
        <draw:custom-shape draw:name="Text 7" draw:style-name="gr3" draw:text-style-name="P4" draw:layer="layout" svg:width="6.603cm" svg:height="2.539cm" svg:x="1.397cm" svg:y="6.35cm">
          <text:p text:style-name="P3"><text:span text:style-name="T15">BigliettoServiceTest, PromozioneIsValidaTest. Isolano il service mockando i repository.</text:span></text:p>
          <draw:enhanced-geometry svg:viewBox="0 0 21600 21600" draw:type="rectangle" draw:enhanced-path="M 0 0 L 21600 0 21600 21600 0 21600 0 0 Z N"/>
        </draw:custom-shape>
        <draw:custom-shape draw:name="Text 8" draw:style-name="gr6" draw:text-style-name="P4" draw:layer="layout" svg:width="6.603cm" svg:height="3.555cm" svg:x="1.397cm" svg:y="9.144cm">
          <text:list text:style-name="L3">
            <text:list-item>
              <text:p text:style-name="P8"><text:span text:style-name="T16">Acquisto senza promo</text:span></text:p>
            </text:list-item>
            <text:list-item>
              <text:p text:style-name="P8"><text:span text:style-name="T16">Acquisto con sconto 10%</text:span></text:p>
            </text:list-item>
            <text:list-item>
              <text:p text:style-name="P8"><text:span text:style-name="T16">Posto occupato → eccezione</text:span></text:p>
            </text:list-item>
            <text:list-item>
              <text:p text:style-name="P8"><text:span text:style-name="T16">Partita annullata → blocco</text:span></text:p>
            </text:list-item>
            <text:list-item>
              <text:p text:style-name="P8"><text:span text:style-name="T16">Promo scaduta → rifiuto</text:span></text:p>
            </text:list-item>
          </text:list>
          <draw:enhanced-geometry svg:viewBox="0 0 21600 21600" draw:type="rectangle" draw:enhanced-path="M 0 0 L 21600 0 21600 21600 0 21600 0 0 Z N"/>
        </draw:custom-shape>
        <draw:custom-shape draw:name="Shape 9" draw:style-name="gr7" draw:text-style-name="P1" draw:layer="layout" svg:width="7.365cm" svg:height="8.889cm" svg:x="9.017cm" svg:y="3.9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 10" draw:style-name="gr8" draw:text-style-name="P1" draw:layer="layout" svg:width="7.365cm" svg:height="1.396cm" svg:x="9.017cm" svg:y="3.937cm">
          <text:p/>
          <draw:enhanced-geometry svg:viewBox="0 0 21600 21600" draw:type="rectangle" draw:enhanced-path="M 0 0 L 21600 0 21600 21600 0 21600 0 0 Z N"/>
        </draw:custom-shape>
        <draw:custom-shape draw:name="Text 11" draw:style-name="gr3" draw:text-style-name="P4" draw:layer="layout" svg:width="4.571cm" svg:height="1.396cm" svg:x="9.398cm" svg:y="3.937cm">
          <text:p text:style-name="P3"><text:span text:style-name="T13">Slice Test</text:span></text:p>
          <draw:enhanced-geometry svg:viewBox="0 0 21600 21600" draw:type="rectangle" draw:enhanced-path="M 0 0 L 21600 0 21600 21600 0 21600 0 0 Z N"/>
        </draw:custom-shape>
        <draw:custom-shape draw:name="Text 12" draw:style-name="gr3" draw:text-style-name="P4" draw:layer="layout" svg:width="2.158cm" svg:height="1.396cm" svg:x="13.97cm" svg:y="3.937cm">
          <text:p text:style-name="P9"><text:span text:style-name="T12">7 test</text:span></text:p>
          <draw:enhanced-geometry svg:viewBox="0 0 21600 21600" draw:type="rectangle" draw:enhanced-path="M 0 0 L 21600 0 21600 21600 0 21600 0 0 Z N"/>
        </draw:custom-shape>
        <draw:custom-shape draw:name="Text 13" draw:style-name="gr3" draw:text-style-name="P4" draw:layer="layout" svg:width="6.603cm" svg:height="0.761cm" svg:x="9.398cm" svg:y="5.588cm">
          <text:p text:style-name="P3"><text:span text:style-name="T22">@DataJpaTest + H2</text:span></text:p>
          <draw:enhanced-geometry svg:viewBox="0 0 21600 21600" draw:type="rectangle" draw:enhanced-path="M 0 0 L 21600 0 21600 21600 0 21600 0 0 Z N"/>
        </draw:custom-shape>
        <draw:custom-shape draw:name="Text 14" draw:style-name="gr3" draw:text-style-name="P4" draw:layer="layout" svg:width="6.603cm" svg:height="2.539cm" svg:x="9.398cm" svg:y="6.35cm">
          <text:p text:style-name="P3"><text:span text:style-name="T15">RepositoryTest. Avvia H2 in-memory, verifica le query JPA contro schema reale.</text:span></text:p>
          <draw:enhanced-geometry svg:viewBox="0 0 21600 21600" draw:type="rectangle" draw:enhanced-path="M 0 0 L 21600 0 21600 21600 0 21600 0 0 Z N"/>
        </draw:custom-shape>
        <draw:custom-shape draw:name="Text 15" draw:style-name="gr6" draw:text-style-name="P4" draw:layer="layout" svg:width="6.603cm" svg:height="3.555cm" svg:x="9.398cm" svg:y="9.144cm">
          <text:list text:style-name="L3">
            <text:list-item>
              <text:p text:style-name="P8"><text:span text:style-name="T16">findByEmail trovato</text:span></text:p>
            </text:list-item>
            <text:list-item>
              <text:p text:style-name="P8"><text:span text:style-name="T16">existsByEmail</text:span></text:p>
            </text:list-item>
            <text:list-item>
              <text:p text:style-name="P8"><text:span text:style-name="T16">Posto libero/occupato</text:span></text:p>
            </text:list-item>
            <text:list-item>
              <text:p text:style-name="P8"><text:span text:style-name="T16">findPostiOccupatiByPartita</text:span></text:p>
            </text:list-item>
            <text:list-item>
              <text:p text:style-name="P8"><text:span text:style-name="T16">findByCodice promo</text:span></text:p>
            </text:list-item>
          </text:list>
          <draw:enhanced-geometry svg:viewBox="0 0 21600 21600" draw:type="rectangle" draw:enhanced-path="M 0 0 L 21600 0 21600 21600 0 21600 0 0 Z N"/>
        </draw:custom-shape>
        <draw:custom-shape draw:name="Shape 16" draw:style-name="gr7" draw:text-style-name="P1" draw:layer="layout" svg:width="7.365cm" svg:height="8.889cm" svg:x="17.018cm" svg:y="3.9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 17" draw:style-name="gr8" draw:text-style-name="P1" draw:layer="layout" svg:width="7.365cm" svg:height="1.396cm" svg:x="17.018cm" svg:y="3.937cm">
          <text:p/>
          <draw:enhanced-geometry svg:viewBox="0 0 21600 21600" draw:type="rectangle" draw:enhanced-path="M 0 0 L 21600 0 21600 21600 0 21600 0 0 Z N"/>
        </draw:custom-shape>
        <draw:custom-shape draw:name="Text 18" draw:style-name="gr3" draw:text-style-name="P4" draw:layer="layout" svg:width="4.571cm" svg:height="1.396cm" svg:x="17.399cm" svg:y="3.937cm">
          <text:p text:style-name="P3"><text:span text:style-name="T13">Integration Test</text:span></text:p>
          <draw:enhanced-geometry svg:viewBox="0 0 21600 21600" draw:type="rectangle" draw:enhanced-path="M 0 0 L 21600 0 21600 21600 0 21600 0 0 Z N"/>
        </draw:custom-shape>
        <draw:custom-shape draw:name="Text 19" draw:style-name="gr3" draw:text-style-name="P4" draw:layer="layout" svg:width="2.158cm" svg:height="1.396cm" svg:x="21.971cm" svg:y="3.937cm">
          <text:p text:style-name="P9"><text:span text:style-name="T12">5 test</text:span></text:p>
          <draw:enhanced-geometry svg:viewBox="0 0 21600 21600" draw:type="rectangle" draw:enhanced-path="M 0 0 L 21600 0 21600 21600 0 21600 0 0 Z N"/>
        </draw:custom-shape>
        <draw:custom-shape draw:name="Text 20" draw:style-name="gr3" draw:text-style-name="P4" draw:layer="layout" svg:width="6.603cm" svg:height="0.761cm" svg:x="17.399cm" svg:y="5.588cm">
          <text:p text:style-name="P3"><text:span text:style-name="T22">@SpringBootTest + MockMvc</text:span></text:p>
          <draw:enhanced-geometry svg:viewBox="0 0 21600 21600" draw:type="rectangle" draw:enhanced-path="M 0 0 L 21600 0 21600 21600 0 21600 0 0 Z N"/>
        </draw:custom-shape>
        <draw:custom-shape draw:name="Text 21" draw:style-name="gr3" draw:text-style-name="P4" draw:layer="layout" svg:width="6.603cm" svg:height="2.539cm" svg:x="17.399cm" svg:y="6.35cm">
          <text:p text:style-name="P3"><text:span text:style-name="T15">AuthControllerTest. Avvia il contesto Spring completo, simula richieste HTTP reali.</text:span></text:p>
          <draw:enhanced-geometry svg:viewBox="0 0 21600 21600" draw:type="rectangle" draw:enhanced-path="M 0 0 L 21600 0 21600 21600 0 21600 0 0 Z N"/>
        </draw:custom-shape>
        <draw:custom-shape draw:name="Text 22" draw:style-name="gr6" draw:text-style-name="P4" draw:layer="layout" svg:width="6.603cm" svg:height="3.555cm" svg:x="17.399cm" svg:y="9.144cm">
          <text:list text:style-name="L3">
            <text:list-item>
              <text:p text:style-name="P8"><text:span text:style-name="T16">POST /register → 201</text:span></text:p>
            </text:list-item>
            <text:list-item>
              <text:p text:style-name="P8"><text:span text:style-name="T16">POST /register email dup → 400</text:span></text:p>
            </text:list-item>
            <text:list-item>
              <text:p text:style-name="P8"><text:span text:style-name="T16">POST /login valido → JWT</text:span></text:p>
            </text:list-item>
            <text:list-item>
              <text:p text:style-name="P8"><text:span text:style-name="T16">POST /login pwd errata → 401</text:span></text:p>
            </text:list-item>
            <text:list-item>
              <text:p text:style-name="P8"><text:span text:style-name="T16">Validazione password corta</text:span></text:p>
            </text:list-item>
          </text:list>
          <draw:enhanced-geometry svg:viewBox="0 0 21600 21600" draw:type="rectangle" draw:enhanced-path="M 0 0 L 21600 0 21600 21600 0 21600 0 0 Z N"/>
        </draw:custom-shape>
        <draw:custom-shape draw:name="Shape 23" draw:style-name="gr12" draw:text-style-name="P1" draw:layer="layout" svg:width="23.367cm" svg:height="0.761cm" svg:x="1.016cm" svg:y="12.5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24" draw:style-name="gr3" draw:text-style-name="P4" draw:layer="layout" svg:width="22.859cm" svg:height="0.761cm" svg:x="1.397cm" svg:y="12.573cm">
          <text:p text:style-name="P3"><text:span text:style-name="T23">$ cd backend &amp;&amp; mvn test <text:s text:c="4"/>→ <text:s text:c="4"/>Tests run: 23, Failures: 0, Errors: 0, Skipped: 0</text:span></text:p>
          <draw:enhanced-geometry svg:viewBox="0 0 21600 21600" draw:type="rectangle" draw:enhanced-path="M 0 0 L 21600 0 21600 21600 0 21600 0 0 Z N"/>
        </draw:custom-shape>
        <draw:custom-shape draw:name="Text 25" draw:style-name="gr6" draw:text-style-name="P4" draw:layer="layout" svg:width="15.239cm" svg:height="0.634cm" svg:x="1.016cm" svg:y="13.399cm">
          <text:p text:style-name="P3"><text:span text:style-name="T16">TicketStadio · Ingegneria del Software</text:span></text:p>
          <draw:enhanced-geometry svg:viewBox="0 0 21600 21600" draw:type="rectangle" draw:enhanced-path="M 0 0 L 21600 0 21600 21600 0 21600 0 0 Z N"/>
        </draw:custom-shape>
        <draw:custom-shape draw:name="Text 26" draw:style-name="gr6" draw:text-style-name="P4" draw:layer="layout" svg:width="1.523cm" svg:height="0.634cm" svg:x="22.86cm" svg:y="13.399cm">
          <text:p text:style-name="P9"><text:span text:style-name="T16">7 / 10</text:span></text:p>
          <draw:enhanced-geometry svg:viewBox="0 0 21600 21600" draw:type="rectangle" draw:enhanced-path="M 0 0 L 21600 0 21600 21600 0 21600 0 0 Z N"/>
        </draw:custom-shape>
        <presentation:notes draw:style-name="dp2">
          <draw:page-thumbnail draw:name="Slide Image Placeholder 1" draw:style-name="gr5" draw:layer="layout" svg:width="15.239cm" svg:height="8.572cm" svg:x="1.905cm" svg:y="3.175cm" draw:page-number="7" presentation:class="page"/>
          <draw:frame draw:name="Notes Placeholder 2" presentation:style-name="pr1" draw:text-style-name="P4" draw:layer="layout" svg:width="15.239cm" svg:height="10cm" svg:x="1.905cm" svg:y="12.224cm" presentation:class="notes" presentation:user-transformed="true">
            <draw:text-box>
              <text:p><text:span text:style-name="T6">La piramide del testing è rispettata: tanti unit test alla base (veloci, isolati), pochi integration test in cima (lenti ma realistici). Il framework usato per gli integration è MockMvc, che simula richieste HTTP senza avviare un vero server. Se il prof chiede 'mostrami un test', apro BigliettoServiceTest.acquista_promoSconto che è il più completo: setup con builder, mock dei repository, verifica del prezzo scontato e che il pagamento sia stato salvato.</text:span></text:p>
            </draw:text-box>
          </draw:frame>
          <draw:frame draw:name="Slide Number Placeholder 3" presentation:style-name="pr2" draw:text-style-name="P6" draw:layer="layout" svg:width="8.254cm" svg:height="1.273cm" svg:x="10.791cm" svg:y="24.126cm" presentation:class="page-number" presentation:user-transformed="true">
            <draw:text-box>
              <text:p text:style-name="P5"><text:span text:style-name="T7"><text:page-number>&lt;numero&gt;</text:page-number></text:span></text:p>
            </draw:text-box>
          </draw:frame>
        </presentation:notes>
      </draw:page>
      <draw:page draw:name="Slide 8" draw:style-name="dp3" draw:master-page-name="Predefinito">
        <draw:custom-shape draw:name="Text 0" draw:style-name="gr3" draw:text-style-name="P4" draw:layer="layout" svg:width="20.319cm" svg:height="1.396cm" svg:x="1.016cm" svg:y="0.889cm">
          <text:p text:style-name="P3"><text:span text:style-name="T8">Disegno architetturale</text:span></text:p>
          <draw:enhanced-geometry svg:viewBox="0 0 21600 21600" draw:type="rectangle" draw:enhanced-path="M 0 0 L 21600 0 21600 21600 0 21600 0 0 Z N"/>
        </draw:custom-shape>
        <draw:custom-shape draw:name="Text 1" draw:style-name="gr3" draw:text-style-name="P4" draw:layer="layout" svg:width="22.859cm" svg:height="0.761cm" svg:x="1.016cm" svg:y="2.337cm">
          <text:p text:style-name="P3"><text:span text:style-name="T9">Architettura a 3 livelli con pattern MVC e Repository</text:span></text:p>
          <draw:enhanced-geometry svg:viewBox="0 0 21600 21600" draw:type="rectangle" draw:enhanced-path="M 0 0 L 21600 0 21600 21600 0 21600 0 0 Z N"/>
        </draw:custom-shape>
        <draw:custom-shape draw:name="Shape 2" draw:style-name="gr12" draw:text-style-name="P1" draw:layer="layout" svg:width="6.857cm" svg:height="8.127cm" svg:x="1.016cm" svg:y="4.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Image 0" draw:style-name="gr2" draw:text-style-name="P2" draw:layer="layout" svg:width="1.142cm" svg:height="1.142cm" svg:x="3.937cm" svg:y="4.445cm">
          <draw:image xlink:href="Pictures/100002010000010000000100E7CC376E.png" xlink:type="simple" xlink:show="embed" xlink:actuate="onLoad">
            <text:p/>
          </draw:image>
        </draw:frame>
        <draw:custom-shape draw:name="Text 3" draw:style-name="gr3" draw:text-style-name="P4" draw:layer="layout" svg:width="6.857cm" svg:height="0.888cm" svg:x="1.016cm" svg:y="5.842cm">
          <text:p text:style-name="P10"><text:span text:style-name="T18">CLIENT</text:span></text:p>
          <draw:enhanced-geometry svg:viewBox="0 0 21600 21600" draw:type="rectangle" draw:enhanced-path="M 0 0 L 21600 0 21600 21600 0 21600 0 0 Z N"/>
        </draw:custom-shape>
        <draw:custom-shape draw:name="Text 4" draw:style-name="gr3" draw:text-style-name="P4" draw:layer="layout" svg:width="6.857cm" svg:height="0.761cm" svg:x="1.016cm" svg:y="6.604cm">
          <text:p text:style-name="P10"><text:span text:style-name="T17">Browser web</text:span></text:p>
          <draw:enhanced-geometry svg:viewBox="0 0 21600 21600" draw:type="rectangle" draw:enhanced-path="M 0 0 L 21600 0 21600 21600 0 21600 0 0 Z N"/>
        </draw:custom-shape>
        <draw:custom-shape draw:name="Text 5" draw:style-name="gr6" draw:text-style-name="P4" draw:layer="layout" svg:width="6.095cm" svg:height="4.317cm" svg:x="1.397cm" svg:y="7.747cm">
          <text:list text:style-name="L4">
            <text:list-item>
              <text:p text:style-name="P14"><text:span text:style-name="T15">HTML5</text:span></text:p>
            </text:list-item>
            <text:list-item>
              <text:p text:style-name="P14"><text:span text:style-name="T15">CSS3 (custom prop.)</text:span></text:p>
            </text:list-item>
            <text:list-item>
              <text:p text:style-name="P14"><text:span text:style-name="T15">JS vanilla (3 moduli)</text:span></text:p>
            </text:list-item>
            <text:list-item>
              <text:p text:style-name="P14"><text:span text:style-name="T15">fetch() + JWT</text:span></text:p>
            </text:list-item>
          </text:list>
          <draw:enhanced-geometry svg:viewBox="0 0 21600 21600" draw:type="rectangle" draw:enhanced-path="M 0 0 L 21600 0 21600 21600 0 21600 0 0 Z N"/>
        </draw:custom-shape>
        <draw:custom-shape draw:name="Shape 6" draw:style-name="gr8" draw:text-style-name="P1" draw:layer="layout" svg:width="6.857cm" svg:height="8.127cm" svg:x="9.271cm" svg:y="4.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Image 1" draw:style-name="gr2" draw:text-style-name="P2" draw:layer="layout" svg:width="1.142cm" svg:height="1.142cm" svg:x="12.192cm" svg:y="4.445cm">
          <draw:image xlink:href="Pictures/10000201000001000000010073D87919.png" xlink:type="simple" xlink:show="embed" xlink:actuate="onLoad">
            <text:p/>
          </draw:image>
        </draw:frame>
        <draw:custom-shape draw:name="Text 7" draw:style-name="gr3" draw:text-style-name="P4" draw:layer="layout" svg:width="6.857cm" svg:height="0.888cm" svg:x="9.271cm" svg:y="5.842cm">
          <text:p text:style-name="P10"><text:span text:style-name="T18">SERVER</text:span></text:p>
          <draw:enhanced-geometry svg:viewBox="0 0 21600 21600" draw:type="rectangle" draw:enhanced-path="M 0 0 L 21600 0 21600 21600 0 21600 0 0 Z N"/>
        </draw:custom-shape>
        <draw:custom-shape draw:name="Text 8" draw:style-name="gr3" draw:text-style-name="P4" draw:layer="layout" svg:width="6.857cm" svg:height="0.761cm" svg:x="9.271cm" svg:y="6.604cm">
          <text:p text:style-name="P10"><text:span text:style-name="T17">Spring Boot 3.2</text:span></text:p>
          <draw:enhanced-geometry svg:viewBox="0 0 21600 21600" draw:type="rectangle" draw:enhanced-path="M 0 0 L 21600 0 21600 21600 0 21600 0 0 Z N"/>
        </draw:custom-shape>
        <draw:custom-shape draw:name="Text 9" draw:style-name="gr6" draw:text-style-name="P4" draw:layer="layout" svg:width="6.095cm" svg:height="4.317cm" svg:x="9.652cm" svg:y="7.747cm">
          <text:list text:style-name="L4">
            <text:list-item>
              <text:p text:style-name="P14"><text:span text:style-name="T15">Controller (REST)</text:span></text:p>
            </text:list-item>
            <text:list-item>
              <text:p text:style-name="P14"><text:span text:style-name="T15">Service (logic)</text:span></text:p>
            </text:list-item>
            <text:list-item>
              <text:p text:style-name="P14"><text:span text:style-name="T15">Repository (JPA)</text:span></text:p>
            </text:list-item>
            <text:list-item>
              <text:p text:style-name="P14"><text:span text:style-name="T15">Security (JWT filter)</text:span></text:p>
            </text:list-item>
          </text:list>
          <draw:enhanced-geometry svg:viewBox="0 0 21600 21600" draw:type="rectangle" draw:enhanced-path="M 0 0 L 21600 0 21600 21600 0 21600 0 0 Z N"/>
        </draw:custom-shape>
        <draw:custom-shape draw:name="Shape 10" draw:style-name="gr13" draw:text-style-name="P1" draw:layer="layout" svg:width="6.857cm" svg:height="8.127cm" svg:x="17.526cm" svg:y="4.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Image 2" draw:style-name="gr2" draw:text-style-name="P2" draw:layer="layout" svg:width="1.142cm" svg:height="1.142cm" svg:x="20.447cm" svg:y="4.445cm">
          <draw:image xlink:href="Pictures/100002010000010000000100B1538634.png" xlink:type="simple" xlink:show="embed" xlink:actuate="onLoad">
            <text:p/>
          </draw:image>
        </draw:frame>
        <draw:custom-shape draw:name="Text 11" draw:style-name="gr3" draw:text-style-name="P4" draw:layer="layout" svg:width="6.857cm" svg:height="0.888cm" svg:x="17.526cm" svg:y="5.842cm">
          <text:p text:style-name="P10"><text:span text:style-name="T18">DATABASE</text:span></text:p>
          <draw:enhanced-geometry svg:viewBox="0 0 21600 21600" draw:type="rectangle" draw:enhanced-path="M 0 0 L 21600 0 21600 21600 0 21600 0 0 Z N"/>
        </draw:custom-shape>
        <draw:custom-shape draw:name="Text 12" draw:style-name="gr3" draw:text-style-name="P4" draw:layer="layout" svg:width="6.857cm" svg:height="0.761cm" svg:x="17.526cm" svg:y="6.604cm">
          <text:p text:style-name="P10"><text:span text:style-name="T17">MySQL 8.0 InnoDB</text:span></text:p>
          <draw:enhanced-geometry svg:viewBox="0 0 21600 21600" draw:type="rectangle" draw:enhanced-path="M 0 0 L 21600 0 21600 21600 0 21600 0 0 Z N"/>
        </draw:custom-shape>
        <draw:custom-shape draw:name="Text 13" draw:style-name="gr6" draw:text-style-name="P4" draw:layer="layout" svg:width="6.095cm" svg:height="4.317cm" svg:x="17.907cm" svg:y="7.747cm">
          <text:list text:style-name="L4">
            <text:list-item>
              <text:p text:style-name="P14"><text:span text:style-name="T15">10 tabelle (3FN)</text:span></text:p>
            </text:list-item>
            <text:list-item>
              <text:p text:style-name="P14"><text:span text:style-name="T15">Vincoli UNIQUE</text:span></text:p>
            </text:list-item>
            <text:list-item>
              <text:p text:style-name="P14"><text:span text:style-name="T15">Transazioni ACID</text:span></text:p>
            </text:list-item>
            <text:list-item>
              <text:p text:style-name="P14"><text:span text:style-name="T15">ENUM tipizzati</text:span></text:p>
            </text:list-item>
          </text:list>
          <draw:enhanced-geometry svg:viewBox="0 0 21600 21600" draw:type="rectangle" draw:enhanced-path="M 0 0 L 21600 0 21600 21600 0 21600 0 0 Z N"/>
        </draw:custom-shape>
        <draw:line draw:name="Shape 14" draw:style-name="gr14" draw:text-style-name="P2" draw:layer="layout" svg:x1="7.874cm" svg:y1="8.128cm" svg:x2="9.271cm" svg:y2="8.128cm">
          <text:p/>
        </draw:line>
        <draw:custom-shape draw:name="Text 15" draw:style-name="gr3" draw:text-style-name="P4" draw:layer="layout" svg:width="1.904cm" svg:height="0.634cm" svg:x="7.62cm" svg:y="7.493cm">
          <text:p text:style-name="P10"><text:span text:style-name="T24">HTTP/JSON</text:span></text:p>
          <draw:enhanced-geometry svg:viewBox="0 0 21600 21600" draw:type="rectangle" draw:enhanced-path="M 0 0 L 21600 0 21600 21600 0 21600 0 0 Z N"/>
        </draw:custom-shape>
        <draw:line draw:name="Shape 16" draw:style-name="gr14" draw:text-style-name="P2" draw:layer="layout" svg:x1="16.129cm" svg:y1="8.128cm" svg:x2="17.526cm" svg:y2="8.128cm">
          <text:p/>
        </draw:line>
        <draw:custom-shape draw:name="Text 17" draw:style-name="gr3" draw:text-style-name="P4" draw:layer="layout" svg:width="1.65cm" svg:height="0.634cm" svg:x="16.002cm" svg:y="7.493cm">
          <text:p text:style-name="P10"><text:span text:style-name="T24">JDBC</text:span></text:p>
          <draw:enhanced-geometry svg:viewBox="0 0 21600 21600" draw:type="rectangle" draw:enhanced-path="M 0 0 L 21600 0 21600 21600 0 21600 0 0 Z N"/>
        </draw:custom-shape>
        <draw:custom-shape draw:name="Text 18" draw:style-name="gr3" draw:text-style-name="P4" draw:layer="layout" svg:width="22.859cm" svg:height="1.015cm" svg:x="1.27cm" svg:y="12.7cm">
          <text:p text:style-name="P3"><text:span text:style-name="T11">Pattern adottati: </text:span><text:span text:style-name="T12">MVC server-side · Service Layer · Repository · DTO · Dependency Injection · REST resource-oriented · Stateless authentication.</text:span></text:p>
          <draw:enhanced-geometry svg:viewBox="0 0 21600 21600" draw:type="rectangle" draw:enhanced-path="M 0 0 L 21600 0 21600 21600 0 21600 0 0 Z N"/>
        </draw:custom-shape>
        <draw:custom-shape draw:name="Text 19" draw:style-name="gr6" draw:text-style-name="P4" draw:layer="layout" svg:width="15.239cm" svg:height="0.634cm" svg:x="1.016cm" svg:y="13.399cm">
          <text:p text:style-name="P3"><text:span text:style-name="T16">TicketStadio · Ingegneria del Software</text:span></text:p>
          <draw:enhanced-geometry svg:viewBox="0 0 21600 21600" draw:type="rectangle" draw:enhanced-path="M 0 0 L 21600 0 21600 21600 0 21600 0 0 Z N"/>
        </draw:custom-shape>
        <draw:custom-shape draw:name="Text 20" draw:style-name="gr6" draw:text-style-name="P4" draw:layer="layout" svg:width="1.523cm" svg:height="0.634cm" svg:x="22.86cm" svg:y="13.399cm">
          <text:p text:style-name="P9"><text:span text:style-name="T16">8 / 10</text:span></text:p>
          <draw:enhanced-geometry svg:viewBox="0 0 21600 21600" draw:type="rectangle" draw:enhanced-path="M 0 0 L 21600 0 21600 21600 0 21600 0 0 Z N"/>
        </draw:custom-shape>
        <presentation:notes draw:style-name="dp2">
          <draw:page-thumbnail draw:name="Slide Image Placeholder 1" draw:style-name="gr5" draw:layer="layout" svg:width="15.239cm" svg:height="8.572cm" svg:x="1.905cm" svg:y="3.175cm" draw:page-number="8" presentation:class="page"/>
          <draw:frame draw:name="Notes Placeholder 2" presentation:style-name="pr1" draw:text-style-name="P4" draw:layer="layout" svg:width="15.239cm" svg:height="10cm" svg:x="1.905cm" svg:y="12.224cm" presentation:class="notes" presentation:user-transformed="true">
            <draw:text-box>
              <text:p><text:span text:style-name="T6">Tre livelli, un linguaggio per parlarne: separation of concerns. Il client non sa che il backend è in Java, il backend non sa che il DB è MySQL (potrebbe essere PostgreSQL cambiando solo il driver). Tra client e server c'è solo JSON su HTTP. La scelta di JS vanilla senza framework è didattica: dimostra di sapere DOM, fetch, localStorage senza nascondersi dietro React. Il pattern Repository è quello del Domain-Driven Design di Eric Evans: il service non sa che sotto c'è SQL.</text:span></text:p>
            </draw:text-box>
          </draw:frame>
          <draw:frame draw:name="Slide Number Placeholder 3" presentation:style-name="pr2" draw:text-style-name="P6" draw:layer="layout" svg:width="8.254cm" svg:height="1.273cm" svg:x="10.791cm" svg:y="24.126cm" presentation:class="page-number" presentation:user-transformed="true">
            <draw:text-box>
              <text:p text:style-name="P5"><text:span text:style-name="T7"><text:page-number>&lt;numero&gt;</text:page-number></text:span></text:p>
            </draw:text-box>
          </draw:frame>
        </presentation:notes>
      </draw:page>
      <draw:page draw:name="Slide 9" draw:style-name="dp3" draw:master-page-name="Predefinito">
        <draw:custom-shape draw:name="Text 0" draw:style-name="gr3" draw:text-style-name="P4" draw:layer="layout" svg:width="20.319cm" svg:height="1.396cm" svg:x="1.016cm" svg:y="0.889cm">
          <text:p text:style-name="P3"><text:span text:style-name="T8">Funzionalità implementate</text:span></text:p>
          <draw:enhanced-geometry svg:viewBox="0 0 21600 21600" draw:type="rectangle" draw:enhanced-path="M 0 0 L 21600 0 21600 21600 0 21600 0 0 Z N"/>
        </draw:custom-shape>
        <draw:custom-shape draw:name="Text 1" draw:style-name="gr3" draw:text-style-name="P4" draw:layer="layout" svg:width="22.859cm" svg:height="0.761cm" svg:x="1.016cm" svg:y="2.337cm">
          <text:p text:style-name="P3"><text:span text:style-name="T9">Elenco completo delle feature consegnate</text:span></text:p>
          <draw:enhanced-geometry svg:viewBox="0 0 21600 21600" draw:type="rectangle" draw:enhanced-path="M 0 0 L 21600 0 21600 21600 0 21600 0 0 Z N"/>
        </draw:custom-shape>
        <draw:custom-shape draw:name="Shape 2" draw:style-name="gr8" draw:text-style-name="P1" draw:layer="layout" svg:width="11.556cm" svg:height="1.015cm" svg:x="1.016cm" svg:y="3.81cm">
          <text:p/>
          <draw:enhanced-geometry svg:viewBox="0 0 21600 21600" draw:type="rectangle" draw:enhanced-path="M 0 0 L 21600 0 21600 21600 0 21600 0 0 Z N"/>
        </draw:custom-shape>
        <draw:custom-shape draw:name="Text 3" draw:style-name="gr3" draw:text-style-name="P4" draw:layer="layout" svg:width="11.175cm" svg:height="1.015cm" svg:x="1.397cm" svg:y="3.81cm">
          <text:p text:style-name="P3"><text:span text:style-name="T18">TIFOSO <text:s/>(7 funzionalità)</text:span></text:p>
          <draw:enhanced-geometry svg:viewBox="0 0 21600 21600" draw:type="rectangle" draw:enhanced-path="M 0 0 L 21600 0 21600 21600 0 21600 0 0 Z N"/>
        </draw:custom-shape>
        <draw:custom-shape draw:name="Shape 4" draw:style-name="gr12" draw:text-style-name="P1" draw:layer="layout" svg:width="11.556cm" svg:height="1.015cm" svg:x="12.827cm" svg:y="3.81cm">
          <text:p/>
          <draw:enhanced-geometry svg:viewBox="0 0 21600 21600" draw:type="rectangle" draw:enhanced-path="M 0 0 L 21600 0 21600 21600 0 21600 0 0 Z N"/>
        </draw:custom-shape>
        <draw:custom-shape draw:name="Text 5" draw:style-name="gr3" draw:text-style-name="P4" draw:layer="layout" svg:width="11.175cm" svg:height="1.015cm" svg:x="13.208cm" svg:y="3.81cm">
          <text:p text:style-name="P3"><text:span text:style-name="T18">ADMIN <text:s/>(7 funzionalità)</text:span></text:p>
          <draw:enhanced-geometry svg:viewBox="0 0 21600 21600" draw:type="rectangle" draw:enhanced-path="M 0 0 L 21600 0 21600 21600 0 21600 0 0 Z N"/>
        </draw:custom-shape>
        <draw:frame draw:name="Image 0" draw:style-name="gr2" draw:text-style-name="P2" draw:layer="layout" svg:width="0.761cm" svg:height="0.761cm" svg:x="1.397cm" svg:y="5.334cm">
          <draw:image xlink:href="Pictures/100002010000010000000100CE2CE13A.png" xlink:type="simple" xlink:show="embed" xlink:actuate="onLoad">
            <text:p/>
          </draw:image>
        </draw:frame>
        <draw:custom-shape draw:name="Text 6" draw:style-name="gr3" draw:text-style-name="P4" draw:layer="layout" svg:width="10.159cm" svg:height="1.015cm" svg:x="2.413cm" svg:y="5.207cm">
          <text:p text:style-name="P3"><text:span text:style-name="T12">Registrazione + Login JWT</text:span></text:p>
          <draw:enhanced-geometry svg:viewBox="0 0 21600 21600" draw:type="rectangle" draw:enhanced-path="M 0 0 L 21600 0 21600 21600 0 21600 0 0 Z N"/>
        </draw:custom-shape>
        <draw:frame draw:name="Image 1" draw:style-name="gr2" draw:text-style-name="P2" draw:layer="layout" svg:width="0.761cm" svg:height="0.761cm" svg:x="1.397cm" svg:y="6.477cm">
          <draw:image xlink:href="Pictures/100002010000010000000100FFA09F48.png" xlink:type="simple" xlink:show="embed" xlink:actuate="onLoad">
            <text:p/>
          </draw:image>
        </draw:frame>
        <draw:custom-shape draw:name="Text 7" draw:style-name="gr3" draw:text-style-name="P4" draw:layer="layout" svg:width="10.159cm" svg:height="1.015cm" svg:x="2.413cm" svg:y="6.35cm">
          <text:p text:style-name="P3"><text:span text:style-name="T12">Visualizzazione partite (filtri)</text:span></text:p>
          <draw:enhanced-geometry svg:viewBox="0 0 21600 21600" draw:type="rectangle" draw:enhanced-path="M 0 0 L 21600 0 21600 21600 0 21600 0 0 Z N"/>
        </draw:custom-shape>
        <draw:frame draw:name="Image 2" draw:style-name="gr2" draw:text-style-name="P2" draw:layer="layout" svg:width="0.761cm" svg:height="0.761cm" svg:x="1.397cm" svg:y="7.62cm">
          <draw:image xlink:href="Pictures/10000201000001000000010050045A3E.png" xlink:type="simple" xlink:show="embed" xlink:actuate="onLoad">
            <text:p/>
          </draw:image>
        </draw:frame>
        <draw:custom-shape draw:name="Text 8" draw:style-name="gr3" draw:text-style-name="P4" draw:layer="layout" svg:width="10.159cm" svg:height="1.015cm" svg:x="2.413cm" svg:y="7.493cm">
          <text:p text:style-name="P3"><text:span text:style-name="T12">Acquisto biglietto con posto numerato</text:span></text:p>
          <draw:enhanced-geometry svg:viewBox="0 0 21600 21600" draw:type="rectangle" draw:enhanced-path="M 0 0 L 21600 0 21600 21600 0 21600 0 0 Z N"/>
        </draw:custom-shape>
        <draw:frame draw:name="Image 3" draw:style-name="gr2" draw:text-style-name="P2" draw:layer="layout" svg:width="0.761cm" svg:height="0.761cm" svg:x="1.397cm" svg:y="8.763cm">
          <draw:image xlink:href="Pictures/100002010000010000000100389D842D.png" xlink:type="simple" xlink:show="embed" xlink:actuate="onLoad">
            <text:p/>
          </draw:image>
        </draw:frame>
        <draw:custom-shape draw:name="Text 9" draw:style-name="gr3" draw:text-style-name="P4" draw:layer="layout" svg:width="10.159cm" svg:height="1.015cm" svg:x="2.413cm" svg:y="8.636cm">
          <text:p text:style-name="P3"><text:span text:style-name="T12">Applicazione codici promozionali</text:span></text:p>
          <draw:enhanced-geometry svg:viewBox="0 0 21600 21600" draw:type="rectangle" draw:enhanced-path="M 0 0 L 21600 0 21600 21600 0 21600 0 0 Z N"/>
        </draw:custom-shape>
        <draw:frame draw:name="Image 4" draw:style-name="gr2" draw:text-style-name="P2" draw:layer="layout" svg:width="0.761cm" svg:height="0.761cm" svg:x="1.397cm" svg:y="9.906cm">
          <draw:image xlink:href="Pictures/1000020100000100000001008FAED23D.png" xlink:type="simple" xlink:show="embed" xlink:actuate="onLoad">
            <text:p/>
          </draw:image>
        </draw:frame>
        <draw:custom-shape draw:name="Text 10" draw:style-name="gr3" draw:text-style-name="P4" draw:layer="layout" svg:width="10.159cm" svg:height="1.015cm" svg:x="2.413cm" svg:y="9.779cm">
          <text:p text:style-name="P3"><text:span text:style-name="T12">Sottoscrizione abbonamenti stagionali</text:span></text:p>
          <draw:enhanced-geometry svg:viewBox="0 0 21600 21600" draw:type="rectangle" draw:enhanced-path="M 0 0 L 21600 0 21600 21600 0 21600 0 0 Z N"/>
        </draw:custom-shape>
        <draw:frame draw:name="Image 5" draw:style-name="gr2" draw:text-style-name="P2" draw:layer="layout" svg:width="0.761cm" svg:height="0.761cm" svg:x="1.397cm" svg:y="11.049cm">
          <draw:image xlink:href="Pictures/10000201000001000000010019D81665.png" xlink:type="simple" xlink:show="embed" xlink:actuate="onLoad">
            <text:p/>
          </draw:image>
        </draw:frame>
        <draw:custom-shape draw:name="Text 11" draw:style-name="gr3" draw:text-style-name="P4" draw:layer="layout" svg:width="10.159cm" svg:height="1.015cm" svg:x="2.413cm" svg:y="10.922cm">
          <text:p text:style-name="P3"><text:span text:style-name="T12">Rinnovo abbonamento stagione successiva</text:span></text:p>
          <draw:enhanced-geometry svg:viewBox="0 0 21600 21600" draw:type="rectangle" draw:enhanced-path="M 0 0 L 21600 0 21600 21600 0 21600 0 0 Z N"/>
        </draw:custom-shape>
        <draw:frame draw:name="Image 6" draw:style-name="gr2" draw:text-style-name="P2" draw:layer="layout" svg:width="0.761cm" svg:height="0.761cm" svg:x="1.397cm" svg:y="12.192cm">
          <draw:image xlink:href="Pictures/1000020100000100000001006433B094.png" xlink:type="simple" xlink:show="embed" xlink:actuate="onLoad">
            <text:p/>
          </draw:image>
        </draw:frame>
        <draw:custom-shape draw:name="Text 12" draw:style-name="gr3" draw:text-style-name="P4" draw:layer="layout" svg:width="10.159cm" svg:height="1.015cm" svg:x="2.413cm" svg:y="12.065cm">
          <text:p text:style-name="P3"><text:span text:style-name="T12">Storico personale dei biglietti</text:span></text:p>
          <draw:enhanced-geometry svg:viewBox="0 0 21600 21600" draw:type="rectangle" draw:enhanced-path="M 0 0 L 21600 0 21600 21600 0 21600 0 0 Z N"/>
        </draw:custom-shape>
        <draw:frame draw:name="Image 7" draw:style-name="gr2" draw:text-style-name="P2" draw:layer="layout" svg:width="0.761cm" svg:height="0.761cm" svg:x="13.208cm" svg:y="5.334cm">
          <draw:image xlink:href="Pictures/100002010000010000000100A787CCF9.png" xlink:type="simple" xlink:show="embed" xlink:actuate="onLoad">
            <text:p/>
          </draw:image>
        </draw:frame>
        <draw:custom-shape draw:name="Text 13" draw:style-name="gr3" draw:text-style-name="P4" draw:layer="layout" svg:width="10.159cm" svg:height="1.015cm" svg:x="14.224cm" svg:y="5.207cm">
          <text:p text:style-name="P3"><text:span text:style-name="T12">Dashboard statistiche vendite</text:span></text:p>
          <draw:enhanced-geometry svg:viewBox="0 0 21600 21600" draw:type="rectangle" draw:enhanced-path="M 0 0 L 21600 0 21600 21600 0 21600 0 0 Z N"/>
        </draw:custom-shape>
        <draw:frame draw:name="Image 8" draw:style-name="gr2" draw:text-style-name="P2" draw:layer="layout" svg:width="0.761cm" svg:height="0.761cm" svg:x="13.208cm" svg:y="6.477cm">
          <draw:image xlink:href="Pictures/100002010000010000000100B512B05C.png" xlink:type="simple" xlink:show="embed" xlink:actuate="onLoad">
            <text:p/>
          </draw:image>
        </draw:frame>
        <draw:custom-shape draw:name="Text 14" draw:style-name="gr3" draw:text-style-name="P4" draw:layer="layout" svg:width="10.159cm" svg:height="1.015cm" svg:x="14.224cm" svg:y="6.35cm">
          <text:p text:style-name="P3"><text:span text:style-name="T12">CRUD completo delle partite</text:span></text:p>
          <draw:enhanced-geometry svg:viewBox="0 0 21600 21600" draw:type="rectangle" draw:enhanced-path="M 0 0 L 21600 0 21600 21600 0 21600 0 0 Z N"/>
        </draw:custom-shape>
        <draw:frame draw:name="Image 9" draw:style-name="gr2" draw:text-style-name="P2" draw:layer="layout" svg:width="0.761cm" svg:height="0.761cm" svg:x="13.208cm" svg:y="7.62cm">
          <draw:image xlink:href="Pictures/100002010000010000000100BE6F64DA.png" xlink:type="simple" xlink:show="embed" xlink:actuate="onLoad">
            <text:p/>
          </draw:image>
        </draw:frame>
        <draw:custom-shape draw:name="Text 15" draw:style-name="gr3" draw:text-style-name="P4" draw:layer="layout" svg:width="10.159cm" svg:height="1.015cm" svg:x="14.224cm" svg:y="7.493cm">
          <text:p text:style-name="P3"><text:span text:style-name="T12">Annullamento partita + invalidazione biglietti</text:span></text:p>
          <draw:enhanced-geometry svg:viewBox="0 0 21600 21600" draw:type="rectangle" draw:enhanced-path="M 0 0 L 21600 0 21600 21600 0 21600 0 0 Z N"/>
        </draw:custom-shape>
        <draw:frame draw:name="Image 10" draw:style-name="gr2" draw:text-style-name="P2" draw:layer="layout" svg:width="0.761cm" svg:height="0.761cm" svg:x="13.208cm" svg:y="8.763cm">
          <draw:image xlink:href="Pictures/100002010000010000000100389D842D.png" xlink:type="simple" xlink:show="embed" xlink:actuate="onLoad">
            <text:p/>
          </draw:image>
        </draw:frame>
        <draw:custom-shape draw:name="Text 16" draw:style-name="gr3" draw:text-style-name="P4" draw:layer="layout" svg:width="10.159cm" svg:height="1.015cm" svg:x="14.224cm" svg:y="8.636cm">
          <text:p text:style-name="P3"><text:span text:style-name="T12">Creazione e gestione promozioni</text:span></text:p>
          <draw:enhanced-geometry svg:viewBox="0 0 21600 21600" draw:type="rectangle" draw:enhanced-path="M 0 0 L 21600 0 21600 21600 0 21600 0 0 Z N"/>
        </draw:custom-shape>
        <draw:frame draw:name="Image 11" draw:style-name="gr2" draw:text-style-name="P2" draw:layer="layout" svg:width="0.761cm" svg:height="0.761cm" svg:x="13.208cm" svg:y="9.906cm">
          <draw:image xlink:href="Pictures/100002010000010000000100B41E2A59.png" xlink:type="simple" xlink:show="embed" xlink:actuate="onLoad">
            <text:p/>
          </draw:image>
        </draw:frame>
        <draw:custom-shape draw:name="Text 17" draw:style-name="gr3" draw:text-style-name="P4" draw:layer="layout" svg:width="10.159cm" svg:height="1.015cm" svg:x="14.224cm" svg:y="9.779cm">
          <text:p text:style-name="P3"><text:span text:style-name="T12">Generatore codici promo random</text:span></text:p>
          <draw:enhanced-geometry svg:viewBox="0 0 21600 21600" draw:type="rectangle" draw:enhanced-path="M 0 0 L 21600 0 21600 21600 0 21600 0 0 Z N"/>
        </draw:custom-shape>
        <draw:frame draw:name="Image 12" draw:style-name="gr2" draw:text-style-name="P2" draw:layer="layout" svg:width="0.761cm" svg:height="0.761cm" svg:x="13.208cm" svg:y="11.049cm">
          <draw:image xlink:href="Pictures/1000020100000100000001005628BDB5.png" xlink:type="simple" xlink:show="embed" xlink:actuate="onLoad">
            <text:p/>
          </draw:image>
        </draw:frame>
        <draw:custom-shape draw:name="Text 18" draw:style-name="gr3" draw:text-style-name="P4" draw:layer="layout" svg:width="10.159cm" svg:height="1.015cm" svg:x="14.224cm" svg:y="10.922cm">
          <text:p text:style-name="P3"><text:span text:style-name="T12">Gestione settori dello stadio</text:span></text:p>
          <draw:enhanced-geometry svg:viewBox="0 0 21600 21600" draw:type="rectangle" draw:enhanced-path="M 0 0 L 21600 0 21600 21600 0 21600 0 0 Z N"/>
        </draw:custom-shape>
        <draw:frame draw:name="Image 13" draw:style-name="gr2" draw:text-style-name="P2" draw:layer="layout" svg:width="0.761cm" svg:height="0.761cm" svg:x="13.208cm" svg:y="12.192cm">
          <draw:image xlink:href="Pictures/100002010000010000000100361D1B40.png" xlink:type="simple" xlink:show="embed" xlink:actuate="onLoad">
            <text:p/>
          </draw:image>
        </draw:frame>
        <draw:custom-shape draw:name="Text 19" draw:style-name="gr3" draw:text-style-name="P4" draw:layer="layout" svg:width="10.159cm" svg:height="1.015cm" svg:x="14.224cm" svg:y="12.065cm">
          <text:p text:style-name="P3"><text:span text:style-name="T12">Autorizzazione role-based (@PreAuthorize)</text:span></text:p>
          <draw:enhanced-geometry svg:viewBox="0 0 21600 21600" draw:type="rectangle" draw:enhanced-path="M 0 0 L 21600 0 21600 21600 0 21600 0 0 Z N"/>
        </draw:custom-shape>
        <draw:custom-shape draw:name="Text 20" draw:style-name="gr6" draw:text-style-name="P4" draw:layer="layout" svg:width="15.239cm" svg:height="0.634cm" svg:x="1.016cm" svg:y="13.399cm">
          <text:p text:style-name="P3"><text:span text:style-name="T16">TicketStadio · Ingegneria del Software</text:span></text:p>
          <draw:enhanced-geometry svg:viewBox="0 0 21600 21600" draw:type="rectangle" draw:enhanced-path="M 0 0 L 21600 0 21600 21600 0 21600 0 0 Z N"/>
        </draw:custom-shape>
        <draw:custom-shape draw:name="Text 21" draw:style-name="gr6" draw:text-style-name="P4" draw:layer="layout" svg:width="1.523cm" svg:height="0.634cm" svg:x="22.86cm" svg:y="13.399cm">
          <text:p text:style-name="P9"><text:span text:style-name="T16">9 / 10</text:span></text:p>
          <draw:enhanced-geometry svg:viewBox="0 0 21600 21600" draw:type="rectangle" draw:enhanced-path="M 0 0 L 21600 0 21600 21600 0 21600 0 0 Z N"/>
        </draw:custom-shape>
        <presentation:notes draw:style-name="dp2">
          <draw:page-thumbnail draw:name="Slide Image Placeholder 1" draw:style-name="gr5" draw:layer="layout" svg:width="15.239cm" svg:height="8.572cm" svg:x="1.905cm" svg:y="3.175cm" draw:page-number="9" presentation:class="page"/>
          <draw:frame draw:name="Notes Placeholder 2" presentation:style-name="pr1" draw:text-style-name="P4" draw:layer="layout" svg:width="15.239cm" svg:height="10cm" svg:x="1.905cm" svg:y="12.224cm" presentation:class="notes" presentation:user-transformed="true">
            <draw:text-box>
              <text:p><text:span text:style-name="T6">14 funzionalità totali — 7 per il tifoso, 7 per l'admin. L'autorizzazione è granulare: ogni endpoint admin è protetto da @PreAuthorize('hasRole(ADMIN)') che Spring Security verifica prima di entrare nel metodo. Se un tifoso prova a chiamare un endpoint admin riceve 403 Forbidden. Il backend espone in totale circa 25 endpoint REST documentati automaticamente da Swagger UI.</text:span></text:p>
            </draw:text-box>
          </draw:frame>
          <draw:frame draw:name="Slide Number Placeholder 3" presentation:style-name="pr2" draw:text-style-name="P6" draw:layer="layout" svg:width="8.254cm" svg:height="1.273cm" svg:x="10.791cm" svg:y="24.126cm" presentation:class="page-number" presentation:user-transformed="true">
            <draw:text-box>
              <text:p text:style-name="P5"><text:span text:style-name="T7"><text:page-number>&lt;numero&gt;</text:page-number></text:span></text:p>
            </draw:text-box>
          </draw:frame>
        </presentation:notes>
      </draw:page>
      <draw:page draw:name="Slide 10" draw:style-name="dp3" draw:master-page-name="Predefinito">
        <draw:custom-shape draw:name="Text 0" draw:style-name="gr3" draw:text-style-name="P4" draw:layer="layout" svg:width="20.319cm" svg:height="1.396cm" svg:x="1.016cm" svg:y="0.889cm">
          <text:p text:style-name="P3"><text:span text:style-name="T8">Dettaglio: acquisto biglietto + feedback</text:span></text:p>
          <draw:enhanced-geometry svg:viewBox="0 0 21600 21600" draw:type="rectangle" draw:enhanced-path="M 0 0 L 21600 0 21600 21600 0 21600 0 0 Z N"/>
        </draw:custom-shape>
        <draw:custom-shape draw:name="Text 1" draw:style-name="gr3" draw:text-style-name="P4" draw:layer="layout" svg:width="22.859cm" svg:height="0.761cm" svg:x="1.016cm" svg:y="2.337cm">
          <text:p text:style-name="P3"><text:span text:style-name="T9">Funzionalità rappresentativa e considerazioni finali</text:span></text:p>
          <draw:enhanced-geometry svg:viewBox="0 0 21600 21600" draw:type="rectangle" draw:enhanced-path="M 0 0 L 21600 0 21600 21600 0 21600 0 0 Z N"/>
        </draw:custom-shape>
        <draw:custom-shape draw:name="Shape 2" draw:style-name="gr7" draw:text-style-name="P1" draw:layer="layout" svg:width="12.699cm" svg:height="8.635cm" svg:x="1.016cm" svg:y="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Image 0" draw:style-name="gr2" draw:text-style-name="P2" draw:layer="layout" svg:width="1.015cm" svg:height="1.015cm" svg:x="1.524cm" svg:y="4.191cm">
          <draw:image xlink:href="Pictures/10000201000001000000010050045A3E.png" xlink:type="simple" xlink:show="embed" xlink:actuate="onLoad">
            <text:p/>
          </draw:image>
        </draw:frame>
        <draw:custom-shape draw:name="Text 3" draw:style-name="gr3" draw:text-style-name="P4" draw:layer="layout" svg:width="10.159cm" svg:height="1.015cm" svg:x="2.794cm" svg:y="4.191cm">
          <text:p text:style-name="P3"><text:span text:style-name="T13">Acquisto biglietto</text:span></text:p>
          <draw:enhanced-geometry svg:viewBox="0 0 21600 21600" draw:type="rectangle" draw:enhanced-path="M 0 0 L 21600 0 21600 21600 0 21600 0 0 Z N"/>
        </draw:custom-shape>
        <draw:custom-shape draw:name="Text 4" draw:style-name="gr3" draw:text-style-name="P4" draw:layer="layout" svg:width="11.937cm" svg:height="0.761cm" svg:x="1.524cm" svg:y="5.461cm">
          <text:p text:style-name="P3"><text:span text:style-name="T25">Flow tecnico (BigliettoService.acquista):</text:span></text:p>
          <draw:enhanced-geometry svg:viewBox="0 0 21600 21600" draw:type="rectangle" draw:enhanced-path="M 0 0 L 21600 0 21600 21600 0 21600 0 0 Z N"/>
        </draw:custom-shape>
        <draw:custom-shape draw:name="Text 5" draw:style-name="gr6" draw:text-style-name="P4" draw:layer="layout" svg:width="11.937cm" svg:height="6.349cm" svg:x="1.524cm" svg:y="6.096cm">
          <text:p text:style-name="P15"><text:span text:style-name="T15">1. JwtFilter valida il token e popola SecurityContext</text:span></text:p>
          <text:p text:style-name="P15"><text:span text:style-name="T15">2. @PreAuthorize verifica autenticazione</text:span></text:p>
          <text:p text:style-name="P15"><text:span text:style-name="T15">3. @Valid valida il body della request</text:span></text:p>
          <text:p text:style-name="P15"><text:span text:style-name="T15">4. Service apre transazione (@Transactional)</text:span></text:p>
          <text:p text:style-name="P15"><text:span text:style-name="T15">5. Controllo disponibilità posto (existsByPartitaAndPosto)</text:span></text:p>
          <text:p text:style-name="P15"><text:span text:style-name="T15">6. Applicazione promo (se presente e valida)</text:span></text:p>
          <text:p text:style-name="P15"><text:span text:style-name="T15">7. INSERT biglietto + INSERT pagamento atomici</text:span></text:p>
          <text:p text:style-name="P15"><text:span text:style-name="T25">8. Vincolo UNIQUE DB blocca race condition → 409</text:span></text:p>
          <draw:enhanced-geometry svg:viewBox="0 0 21600 21600" draw:type="rectangle" draw:enhanced-path="M 0 0 L 21600 0 21600 21600 0 21600 0 0 Z N"/>
        </draw:custom-shape>
        <draw:custom-shape draw:name="Shape 6" draw:style-name="gr8" draw:text-style-name="P1" draw:layer="layout" svg:width="10.159cm" svg:height="8.635cm" svg:x="14.224cm" svg:y="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Image 1" draw:style-name="gr2" draw:text-style-name="P2" draw:layer="layout" svg:width="1.015cm" svg:height="1.015cm" svg:x="14.732cm" svg:y="4.191cm">
          <draw:image xlink:href="Pictures/100002010000010000000100D2FD87C0.png" xlink:type="simple" xlink:show="embed" xlink:actuate="onLoad">
            <text:p/>
          </draw:image>
        </draw:frame>
        <draw:custom-shape draw:name="Text 7" draw:style-name="gr3" draw:text-style-name="P4" draw:layer="layout" svg:width="7.873cm" svg:height="1.015cm" svg:x="16.002cm" svg:y="4.191cm">
          <text:p text:style-name="P3"><text:span text:style-name="T13">Feedback esperienza</text:span></text:p>
          <draw:enhanced-geometry svg:viewBox="0 0 21600 21600" draw:type="rectangle" draw:enhanced-path="M 0 0 L 21600 0 21600 21600 0 21600 0 0 Z N"/>
        </draw:custom-shape>
        <draw:custom-shape draw:name="Text 8" draw:style-name="gr6" draw:text-style-name="P4" draw:layer="layout" svg:width="9.143cm" svg:height="7.238cm" svg:x="14.732cm" svg:y="5.461cm">
          <text:p text:style-name="P8"><text:span text:style-name="T25">Cosa ha funzionato</text:span></text:p>
          <text:p text:style-name="P8"><text:span text:style-name="T15">Iniziare con lo schema DB ha guidato l'intera architettura. Trello ha evitato lo scope creep.</text:span></text:p>
          <text:p text:style-name="P8"><text:span text:style-name="T26"/></text:p>
          <text:p text:style-name="P8"><text:span text:style-name="T25">Difficoltà incontrate</text:span></text:p>
          <text:p text:style-name="P8"><text:span text:style-name="T15">Bilanciare REST e UX: alcune azioni naturali per l'utente non mappavano subito su una risorsa.</text:span></text:p>
          <text:p text:style-name="P8"><text:span text:style-name="T26"/></text:p>
          <text:p text:style-name="P8"><text:span text:style-name="T25">Cosa farei diversamente</text:span></text:p>
          <text:p text:style-name="P8"><text:span text:style-name="T15">Iniziare prima i test (TDD). Aggiungere Liquibase per le migrazioni DB versionate.</text:span></text:p>
          <draw:enhanced-geometry svg:viewBox="0 0 21600 21600" draw:type="rectangle" draw:enhanced-path="M 0 0 L 21600 0 21600 21600 0 21600 0 0 Z N"/>
        </draw:custom-shape>
        <draw:custom-shape draw:name="Shape 9" draw:style-name="gr8" draw:text-style-name="P1" draw:layer="layout" svg:width="23.367cm" svg:height="0.075cm" svg:x="1.016cm" svg:y="12.624cm">
          <text:p/>
          <draw:enhanced-geometry svg:viewBox="0 0 21600 21600" draw:type="rectangle" draw:enhanced-path="M 0 0 L 21600 0 21600 21600 0 21600 0 0 Z N"/>
        </draw:custom-shape>
        <draw:custom-shape draw:name="Text 10" draw:style-name="gr3" draw:text-style-name="P4" draw:layer="layout" svg:width="23.367cm" svg:height="0.634cm" svg:x="1.016cm" svg:y="12.7cm">
          <text:p text:style-name="P10"><text:span text:style-name="T27">Grazie per l'attenzione <text:s/>· <text:s/>github.com/giacomopanareo/ticketstadio <text:s/>· <text:s/>Aperto a domande</text:span></text:p>
          <draw:enhanced-geometry svg:viewBox="0 0 21600 21600" draw:type="rectangle" draw:enhanced-path="M 0 0 L 21600 0 21600 21600 0 21600 0 0 Z N"/>
        </draw:custom-shape>
        <draw:custom-shape draw:name="Text 11" draw:style-name="gr6" draw:text-style-name="P4" draw:layer="layout" svg:width="15.239cm" svg:height="0.634cm" svg:x="1.016cm" svg:y="13.399cm">
          <text:p text:style-name="P3"><text:span text:style-name="T16">TicketStadio · Ingegneria del Software</text:span></text:p>
          <draw:enhanced-geometry svg:viewBox="0 0 21600 21600" draw:type="rectangle" draw:enhanced-path="M 0 0 L 21600 0 21600 21600 0 21600 0 0 Z N"/>
        </draw:custom-shape>
        <draw:custom-shape draw:name="Text 12" draw:style-name="gr6" draw:text-style-name="P4" draw:layer="layout" svg:width="1.523cm" svg:height="0.634cm" svg:x="22.86cm" svg:y="13.399cm">
          <text:p text:style-name="P9"><text:span text:style-name="T16">10 / 10</text:span></text:p>
          <draw:enhanced-geometry svg:viewBox="0 0 21600 21600" draw:type="rectangle" draw:enhanced-path="M 0 0 L 21600 0 21600 21600 0 21600 0 0 Z N"/>
        </draw:custom-shape>
        <presentation:notes draw:style-name="dp2">
          <draw:page-thumbnail draw:name="Slide Image Placeholder 1" draw:style-name="gr5" draw:layer="layout" svg:width="15.239cm" svg:height="8.572cm" svg:x="1.905cm" svg:y="3.175cm" draw:page-number="10" presentation:class="page"/>
          <draw:frame draw:name="Notes Placeholder 2" presentation:style-name="pr1" draw:text-style-name="P4" draw:layer="layout" svg:width="15.239cm" svg:height="10cm" svg:x="1.905cm" svg:y="12.224cm" presentation:class="notes" presentation:user-transformed="true">
            <draw:text-box>
              <text:p><text:span text:style-name="T6">Concludo con un esempio concreto e un bilancio onesto. L'acquisto è la funzionalità rappresentativa perché tocca tutti i livelli architetturali: sicurezza, validazione, business logic, transazioni, vincoli DB. Il punto 8 in rosso è la lezione tecnica più importante del progetto: il controllo applicativo (existsByPartitaAndPosto) è una protezione ottimista, ma sotto carico concorrente potrebbe fallire. La vera garanzia è il vincolo UNIQUE DB che è atomico.</text:span></text:p>
              <text:p><text:span text:style-name="T6"/></text:p>
              <text:p><text:span text:style-name="T6">Sul feedback: essere onesti. Dire che farei TDD la prossima volta dimostra autocoscienza, non debolezza.</text:span></text:p>
            </draw:text-box>
          </draw:frame>
          <draw:frame draw:name="Slide Number Placeholder 3" presentation:style-name="pr2" draw:text-style-name="P6" draw:layer="layout" svg:width="8.254cm" svg:height="1.273cm" svg:x="10.791cm" svg:y="24.126cm" presentation:class="page-number" presentation:user-transformed="true">
            <draw:text-box>
              <text:p text:style-name="P5"><text:span text:style-name="T7"><text:page-number>&lt;nu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msArrowEnd_20_5" draw:display-name="msArrowEnd 5" svg:viewBox="0 0 300 300" svg:d="M150 0l150 300h-300z"/>
    <draw:stroke-dash draw:name="Dash_20_4" draw:display-name="Dash 4" draw:style="round" draw:dots2="1" draw:dots2-length="212%" draw:distance="159%"/>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solid" draw:fill-color="#ffffff"/>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alibri" fo:font-size="32pt" fo:letter-spacing="normal"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Predefinito-outline2" style:family="presentation" style:parent-style-name="Predefinito-outline1">
      <style:paragraph-properties fo:margin-top="0cm" fo:margin-bottom="0.4cm" fo:text-align="start"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redefinito-outline3" style:family="presentation" style:parent-style-name="Predefinito-outline2">
      <style:paragraph-properties fo:margin-top="0cm" fo:margin-bottom="0.3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finito-outline4" style:family="presentation" style:parent-style-name="Predefinito-outline3">
      <style:paragraph-properties fo:margin-top="0cm" fo:margin-bottom="0.2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4.288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85cm"/>
    </style:style>
    <style:style style:name="Mpr2"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Predefinito" style:page-layout-name="PM1" draw:style-name="Mdp1">
      <draw:frame presentation:style-name="Predefinito-title" draw:layer="backgroundobjects" svg:width="22.859cm" svg:height="2.385cm" svg:x="1.27cm" svg:y="0.57cm" presentation:class="title" presentation:placeholder="true">
        <draw:text-box/>
      </draw:frame>
      <draw:frame presentation:style-name="Predefinito-outline1" draw:layer="backgroundobjects" svg:width="22.859cm" svg:height="9.429cm" svg:x="1.27cm" svg:y="3.343cm" presentation:class="outline" presentation:placeholder="true">
        <draw:text-box/>
      </draw:frame>
      <presentation:notes style:page-layout-name="PM2">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6-06-30T10:33:37.40</dc:date>
    <dc:creator>Giacomo Panareo</dc:creator>
    <meta:generator>OpenOffice/4.1.16$Win32 OpenOffice.org_project/4116m3$Build-9816</meta:generator>
    <meta:editing-duration>PT8M30S</meta:editing-duration>
    <meta:editing-cycles>2</meta:editing-cycles>
    <meta:document-statistic meta:object-count="240"/>
  </office:meta>
</office:document-meta>
</file>